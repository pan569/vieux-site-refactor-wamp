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999999" draw:textarea-horizontal-align="justify" draw:textarea-vertical-align="top" draw:auto-grow-height="false" fo:min-height="2.75cm" fo:min-width="27.2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75cm" fo:min-width="23.5cm"/>
    </style:style>
    <style:style style:name="gr4" style:family="graphic" style:parent-style-name="standard">
      <style:graphic-properties draw:textarea-horizontal-align="justify" draw:textarea-vertical-align="middle" draw:auto-grow-height="false" fo:min-height="13.75cm" fo:min-width="27.2cm"/>
    </style:style>
    <style:style style:name="gr5" style:family="graphic" style:parent-style-name="standard" style:list-style-name="L1">
      <style:graphic-properties draw:fill-color="#999999" draw:textarea-horizontal-align="justify" draw:textarea-vertical-align="top" draw:auto-grow-height="false" fo:min-height="1.75cm" fo:min-width="27.2cm"/>
    </style:style>
    <style:style style:name="gr6" style:family="graphic" style:parent-style-name="standard" style:list-style-name="L1">
      <style:graphic-properties draw:fill-color="#eeeeee" draw:textarea-horizontal-align="justify" draw:textarea-vertical-align="top" draw:auto-grow-height="false" fo:min-height="13.75cm" fo:min-width="26cm"/>
    </style:style>
    <style:style style:name="gr7" style:family="graphic" style:parent-style-name="standard">
      <style:graphic-properties draw:fill-color="#999999" draw:textarea-horizontal-align="justify" draw:textarea-vertical-align="top" draw:auto-grow-height="false" fo:min-height="13.25cm" fo:min-width="20.5cm"/>
    </style:style>
    <style:style style:name="gr8" style:family="graphic" style:parent-style-name="standard">
      <style:graphic-properties draw:fill-color="#b2b2b2" draw:textarea-horizontal-align="justify" draw:textarea-vertical-align="top" draw:auto-grow-height="false" fo:min-height="5.25cm" fo:min-width="3cm"/>
    </style:style>
    <style:style style:name="gr9" style:family="graphic" style:parent-style-name="standard">
      <style:graphic-properties draw:fill-color="#b2b2b2" draw:textarea-horizontal-align="justify" draw:textarea-vertical-align="top" draw:auto-grow-height="false" fo:min-height="12.75cm" fo:min-width="15.5cm"/>
    </style:style>
    <style:style style:name="gr10" style:family="graphic" style:parent-style-name="standard">
      <style:graphic-properties draw:fill-color="#b2b2b2" draw:textarea-horizontal-align="justify" draw:textarea-vertical-align="top" draw:auto-grow-height="false" fo:min-height="5.25cm" fo:min-width="3.5cm"/>
    </style:style>
    <style:style style:name="gr11" style:family="graphic" style:parent-style-name="standard" style:list-style-name="L1">
      <style:graphic-properties draw:fill-color="#eeeeee" draw:textarea-horizontal-align="justify" draw:textarea-vertical-align="top" draw:auto-grow-height="false" fo:min-height="13.75cm" fo:min-width="26cm"/>
    </style:style>
    <style:style style:name="gr12" style:family="graphic" style:parent-style-name="standard">
      <style:graphic-properties draw:fill-color="#999999" draw:textarea-horizontal-align="justify" draw:textarea-vertical-align="top" draw:auto-grow-height="false" fo:min-height="13.25cm" fo:min-width="25cm"/>
    </style:style>
    <style:style style:name="gr13" style:family="graphic" style:parent-style-name="standard">
      <style:graphic-properties draw:stroke="none" draw:fill="none" fo:min-height="0.127cm"/>
    </style:style>
    <style:style style:name="gr14" style:family="graphic" style:parent-style-name="standard">
      <style:graphic-properties draw:stroke="none" svg:stroke-color="#000000" draw:fill="none" draw:fill-color="#ffffff" fo:min-height="1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3cm" fo:min-width="26.0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3.6cm"/>
    </style:style>
    <style:style style:name="co1" style:family="table-column">
      <style:table-column-properties style:column-width="3.986cm" style:use-optimal-column-width="false"/>
    </style:style>
    <style:style style:name="co2" style:family="table-column">
      <style:table-column-properties style:column-width="3.988cm" style:use-optimal-column-width="false"/>
    </style:style>
    <style:style style:name="ro1" style:family="table-row">
      <style:table-row-properties style:row-height="0.264cm"/>
    </style:style>
    <style:style style:name="ro2" style:family="table-row">
      <style:table-row-properties style:row-height="0.667cm"/>
    </style:style>
    <style:style style:name="ro3" style:family="table-row">
      <style:table-row-properties style:row-height="0.669cm"/>
    </style:style>
    <style:style style:name="ce1" style:family="table-cell">
      <style:paragraph-properties fo:text-align="center" fo:border-left="0.03pt solid #000000" fo:border-right="0.03pt solid #000000" fo:border-top="0.03pt solid #000000" fo:border-bottom="none"/>
      <style:text-properties fo:color="#ffffff" style:font-name="Arial Narrow" fo:font-size="10pt" fo:font-weight="bold" style:font-size-asian="10pt" style:font-weight-asian="bold" style:font-size-complex="10pt" style:font-weight-complex="bold"/>
    </style:style>
    <style:style style:name="ce2" style:family="table-cell">
      <style:paragraph-properties fo:border-left="0.03pt solid #000000" fo:border-right="0.03pt solid #000000" fo:border-top="none" fo:border-bottom="none"/>
      <style:text-properties style:font-name="Arial Narrow" fo:font-size="10pt" style:font-size-asian="10pt" style:font-size-complex="10pt"/>
    </style:style>
    <style:style style:name="ce3" style:family="table-cell">
      <style:paragraph-properties fo:border-left="0.03pt solid #000000" fo:border-right="0.03pt solid #000000" fo:border-top="none" fo:border-bottom="0.03pt solid #000000"/>
      <style:text-properties style:font-name="Arial Narrow" fo:font-size="10pt" style:font-size-asian="10pt" style:font-size-complex="10pt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loext:graphic-properties draw:fill-color="#999999"/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  <style:text-properties style:font-name="Arial Narrow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-color="#b2b2b2"/>
      <style:paragraph-properties fo:text-align="start"/>
      <style:text-properties style:font-name="Arial Narrow" fo:font-size="10pt"/>
    </style:style>
    <style:style style:name="P7" style:family="paragraph">
      <loext:graphic-properties draw:fill-color="#eeeeee"/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8" style:family="paragraph">
      <loext:graphic-properties draw:fill-color="#999999"/>
      <style:paragraph-properties fo:text-align="start"/>
      <style:text-properties style:font-name="Arial Narrow" fo:font-size="10pt"/>
    </style:style>
    <style:style style:name="P9" style:family="paragraph">
      <style:text-properties style:font-name="Liberation Sans1" fo:font-size="9pt" style:font-size-asian="9pt" style:font-size-complex="9pt"/>
    </style:style>
    <style:style style:name="P10" style:family="paragraph">
      <loext:graphic-properties draw:fill="none"/>
      <style:text-properties style:font-name="Liberation Sans1"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Arial Narrow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Arial Narrow" fo:font-size="10pt" fo:language="zxx" fo:country="none" fo:font-style="normal" fo:text-shadow="none" style:text-underline-style="none" fo:font-weight="normal" style:letter-kerning="true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font-name="Arial Narrow" fo:font-size="10pt" style:font-size-asian="10pt" style:font-size-complex="10pt"/>
    </style:style>
    <style:style style:name="T3" style:family="text">
      <style:text-properties style:font-name="Arial Narrow" fo:font-size="10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66b3" style:font-name="Arial Narrow" fo:font-size="10pt" style:font-size-asian="10pt" style:font-size-complex="10pt"/>
    </style:style>
    <style:style style:name="T7" style:family="text">
      <style:text-properties fo:color="#0066b3" style:font-name="Arial Narrow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ed1c24" style:font-name="Arial Narrow" fo:font-size="10pt" style:font-size-asian="10pt" style:font-size-complex="10pt"/>
    </style:style>
    <style:style style:name="T9" style:family="text">
      <style:text-properties fo:color="#0066b3" style:font-name="Arial Narrow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ffffff" style:font-name="Arial Narrow"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3cm" svg:x="1cm" svg:y="1cm">
          <text:list text:style-name="L1">
            <text:list-header>
              <text:p text:style-name="P1"><text:span text:style-name="T1">Ente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cm" svg:height="2cm" svg:x="1.5cm" svg:y="1.5cm">
          <text:p text:style-name="P3"><text:span text:style-name="T2">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4cm" svg:height="1cm" svg:x="4cm" svg:y="2cm">
          <text:p text:style-name="P5"><text:span text:style-name="T3">Menu si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7.7cm" svg:height="14cm" svg:x="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7cm" svg:height="2cm" svg:x="1cm" svg:y="18cm">
          <text:list text:style-name="L1">
            <text:list-header>
              <text:p text:style-name="P1"><text:span text:style-name="T1">Pi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6.5cm" svg:height="14cm" svg:x="1.5cm" svg:y="4cm">
          <text:list text:style-name="L1">
            <text:list-header>
              <text:p text:style-name="P1"><text:span text:style-name="T1">Corp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1cm" svg:height="13.5cm" svg:x="2cm" svg:y="4.5cm">
          <text:p text:style-name="P5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cm" svg:height="5.5cm" svg:x="2.5cm" svg:y="5.1cm">
          <text:p text:style-name="P5"><text:span text:style-name="T3">Menu 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4cm" svg:height="1cm" svg:x="2.85cm" svg:y="18.5cm">
          <text:p text:style-name="P5"><text:span text:style-name="T3">Menu pied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6cm" svg:height="13cm" svg:x="6.5cm" svg:y="5cm">
          <text:p text:style-name="P5"><text:span text:style-name="T3">Corps appl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cm" svg:height="5.5cm" svg:x="23.5cm" svg:y="4.5cm">
          <text:p text:style-name="P5"><text:span text:style-name="T3">Autres lien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7" draw:layer="layout" svg:width="26.5cm" svg:height="14cm" svg:x="1.5cm" svg:y="4cm">
          <text:list text:style-name="L1">
            <text:list-header>
              <text:p text:style-name="P1"><text:span text:style-name="T1">Corp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5.5cm" svg:height="13.5cm" svg:x="2cm" svg:y="4.5cm">
          <text:p text:style-name="P5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cm" svg:height="5.5cm" svg:x="2.5cm" svg:y="5cm">
          <text:p text:style-name="P5"><text:span text:style-name="T3">Header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6cm" svg:height="13cm" svg:x="6.5cm" svg:y="5cm">
          <text:p text:style-name="P5"><text:span text:style-name="T3">Corps appl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cm" svg:height="5.5cm" svg:x="23cm" svg:y="5cm">
          <text:p text:style-name="P5"><text:span text:style-name="T3">footer Applica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3" draw:text-style-name="P10" draw:layer="layout" svg:width="16.86cm" svg:height="3.811cm" svg:x="1.5cm" svg:y="1.439cm">
          <draw:text-box>
            <text:p text:style-name="P9"><text:span text:style-name="T4">&lt;meta http-equiv="content-type" content="text/html; charset=utf-8" &gt;</text:span></text:p>
            <text:p text:style-name="P9"><text:span text:style-name="T4"><text:s text:c="4"/></text:span><text:span text:style-name="T4">&lt;meta name="author" content="Stéphane Jourdain" &gt;</text:span></text:p>
            <text:p text:style-name="P9"><text:span text:style-name="T4"><text:s text:c="4"/></text:span><text:span text:style-name="T4">&lt;meta name="description" content="Petite entreprise de l'Avesnois, ApplicWeb est spatialisé dans la création de site web pour professionnel. ApplicWeb crée des application a votre dimension et vous suit selon l'évolution de votre projet. ApplicWeb vous propose des solutions toutes faites ou des projets spécifique." &gt;</text:span></text:p>
            <text:p text:style-name="P9"><text:span text:style-name="T4"><text:s text:c="4"/></text:span><text:span text:style-name="T4">&lt;meta name="keywords" content="developpeur;creantion site;site web;application web;avesnois;Nord;59;Association;PME;particulier" &gt;</text:span></text:p>
            <text:p text:style-name="P9"><text:span text:style-name="T4"><text:s text:c="4"/></text:span><text:span text:style-name="T4">&lt;meta name="generator" content="" &gt;</text:span></text:p>
            <text:p text:style-name="P9"><text:span text:style-name="T4"><text:s text:c="2"/></text:span><text:span text:style-name="T4"><text:tab/></text:span></text:p>
            <text:p text:style-name="P9"><text:span text:style-name="T4"><text:s text:c="2"/></text:span><text:span text:style-name="T4"><text:tab/></text:span><text:span text:style-name="T4">&lt;title&gt;Applicweb&lt;/title&gt;</text:span></text:p>
          </draw:text-box>
        </draw:frame>
        <draw:frame draw:style-name="gr14" draw:text-style-name="P11" draw:layer="layout" svg:width="13.625cm" svg:height="10.5cm" svg:x="1.625cm" svg:y="7.125cm">
          <draw:text-box>
            <text:p/>
            <text:p>-----------------------</text:p>
            <text:p>Liste des meta:</text:p>
            <text:p>-author</text:p>
            <text:p>-description</text:p>
            <text:p>-keyword</text:p>
            <text:p>-----------------------</text:p>
            <text:p/>
            <text:p>titre</text:p>
            <text:p/>
          </draw:text-box>
        </draw:frame>
      </draw:page>
      <draw:page draw:name="page4" draw:style-name="dp1" draw:master-page-name="Default">
        <draw:frame draw:style-name="gr15" draw:text-style-name="P12" draw:layer="layout" svg:width="26.529cm" svg:height="5.123cm" svg:x="1.471cm" svg:y="1.377cm">
          <draw:text-box>
            <text:p><text:span text:style-name="T2">&lt;nav class="MenuSiteNav"&gt;</text:span></text:p>
            <text:p><text:span text:style-name="T2"><text:s text:c="8"/></text:span><text:span text:style-name="T2">&lt;?php foreach($PM-&gt;getListeMenu() as $Menu)</text:span></text:p>
            <text:p><text:span text:style-name="T2"><text:s text:c="8"/></text:span><text:span text:style-name="T2">{ <text:s text:c="11"/></text:span></text:p>
            <text:p><text:span text:style-name="T2"><text:s text:c="12"/></text:span><text:span text:style-name="T2">if( $Menu['source']=="Menu")</text:span></text:p>
            <text:p><text:span text:style-name="T2"><text:s text:c="12"/></text:span><text:span text:style-name="T2">{</text:span></text:p>
            <text:p><text:span text:style-name="T2"><text:s text:c="16"/></text:span><text:span text:style-name="T2">?&gt;&lt;a href="&lt;?= $Menu-&gt;getHref(); ?&gt;" class="MenuSiteNavItem &lt;?= $Menu['css']; ?&gt;" &gt;&lt;img <text:s/>src="&lt;?= $Menu['image']; ?&gt;" title="&lt;?= $Menu['titre']; ?&gt;" alt="&lt;?= $Menu['titre']; ?&gt;" <text:s/>&gt;&lt;/a&gt;&lt;?php</text:span></text:p>
            <text:p><text:span text:style-name="T2"><text:s text:c="12"/></text:span><text:span text:style-name="T2">}</text:span></text:p>
            <text:p><text:span text:style-name="T2"><text:s text:c="8"/></text:span><text:span text:style-name="T2">}</text:span></text:p>
            <text:p><text:span text:style-name="T2"><text:s text:c="8"/></text:span><text:span text:style-name="T2">?&gt;</text:span></text:p>
            <text:p><text:span text:style-name="T2"><text:s text:c="8"/></text:span><text:span text:style-name="T2">&lt;a title="Facebook" href="#" class="MenuSiteNavItem bouton Facebook" &gt;&lt;/a&gt;</text:span></text:p>
            <text:p><text:span text:style-name="T2"><text:s text:c="8"/></text:span><text:span text:style-name="T2">&lt;a title="Twitter" href="#" <text:s/>class="MenuSiteNavItem bouton Twitter" &gt;&lt;/a&gt; <text:s text:c="7"/></text:span></text:p>
            <text:p><text:span text:style-name="T2"><text:s text:c="4"/></text:span><text:span text:style-name="T2">&lt;/nav&gt; <text:s text:c="7"/></text:span></text:p>
          </draw:text-box>
        </draw:frame>
        <draw:frame draw:style-name="gr16" draw:text-style-name="P11" draw:layer="layout" svg:width="24.1cm" svg:height="0.657cm" svg:x="2.25cm" svg:y="7.125cm">
          <draw:text-box>
            <text:p><text:span text:style-name="T5">&lt;</text:span><text:span text:style-name="T6">a </text:span><text:span text:style-name="T7">href</text:span><text:span text:style-name="T6">="</text:span><text:span text:style-name="T8">&lt;?= $Menu-&gt;getHref(); ?&gt;</text:span><text:span text:style-name="T6">" </text:span><text:span text:style-name="T7">class</text:span><text:span text:style-name="T6">="</text:span><text:span text:style-name="T2">MenuSiteNavItem </text:span><text:span text:style-name="T8">&lt;?= $Menu['css']; ?&gt;</text:span><text:span text:style-name="T6">"</text:span><text:span text:style-name="T2"> </text:span><text:span text:style-name="T5">&gt;&lt;</text:span><text:span text:style-name="T9">img</text:span><text:span text:style-name="T6"> <text:s/></text:span><text:span text:style-name="T7">src</text:span><text:span text:style-name="T6">="</text:span><text:span text:style-name="T8">&lt;?= $Menu['image']; ?&gt;</text:span><text:span text:style-name="T6">" </text:span><text:span text:style-name="T7">title</text:span><text:span text:style-name="T6">="</text:span><text:span text:style-name="T8">&lt;?= $Menu['titre']; ?&gt;</text:span><text:span text:style-name="T6">" </text:span><text:span text:style-name="T7">alt</text:span><text:span text:style-name="T6">="</text:span><text:span text:style-name="T8">&lt;?= $Menu['titre']; ?&gt;</text:span><text:span text:style-name="T6">"</text:span><text:span text:style-name="T2"> <text:s/></text:span><text:span text:style-name="T5">&gt;&lt;/</text:span><text:span text:style-name="T6">a</text:span><text:span text:style-name="T5">&gt;</text:span></text:p>
          </draw:text-box>
        </draw:frame>
        <draw:frame draw:style-name="standard" draw:layer="layout" svg:width="3.985cm" svg:height="7.336cm" svg:x="7.704cm" svg:y="10.615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0">Données fond</text:span></text:p>
              </table:table-cell>
            </table:table-row>
            <table:table-row table:style-name="ro2">
              <table:table-cell table:style-name="ce2">
                <text:p><text:span text:style-name="T2">Lien[url]</text:span></text:p>
              </table:table-cell>
            </table:table-row>
            <table:table-row table:style-name="ro2">
              <table:table-cell table:style-name="ce2">
                <text:p><text:span text:style-name="T2">Lien[titre]</text:span></text:p>
              </table:table-cell>
            </table:table-row>
            <table:table-row table:style-name="ro2">
              <table:table-cell table:style-name="ce2">
                <text:p><text:span text:style-name="T2">Lien[css]</text:span></text:p>
              </table:table-cell>
            </table:table-row>
            <table:table-row table:style-name="ro2">
              <table:table-cell table:style-name="ce2">
                <text:p><text:span text:style-name="T2">Lien[description]</text:span></text:p>
              </table:table-cell>
            </table:table-row>
            <table:table-row table:style-name="ro2">
              <table:table-cell table:style-name="ce2">
                <text:p><text:span text:style-name="T2">Lien[cible]</text:span></text:p>
              </table:table-cell>
            </table:table-row>
            <table:table-row table:style-name="ro2">
              <table:table-cell table:style-name="ce2">
                <text:p><text:span text:style-name="T2">Lien[image]</text:span></text:p>
              </table:table-cell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87cm" svg:height="6.671cm" svg:x="12.574cm" svg:y="10.559cm">
          <table:table table:template-name="bw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3"><text:span text:style-name="T10">Données Forme</text:span></text:p>
              </table:table-cell>
            </table:table-row>
            <table:table-row table:style-name="ro2">
              <table:table-cell table:style-name="ce2">
                <text:p><text:span text:style-name="T2">Css</text:span></text:p>
              </table:table-cell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3">
              <table:table-cell table:style-name="ce3"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H18M49S</meta:editing-duration>
    <meta:editing-cycles>7</meta:editing-cycles>
    <meta:generator>LibreOffice/5.4.6.2$Windows_X86_64 LibreOffice_project/4014ce260a04f1026ba855d3b8d91541c224eab8</meta:generator>
    <dc:date>2019-08-13T06:16:26.940000000</dc:date>
    <meta:document-statistic meta:object-count="22"/>
  </office:meta>
</office:document-meta>
</file>