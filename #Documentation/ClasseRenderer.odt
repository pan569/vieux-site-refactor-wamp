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1.46cm" table:align="left"/>
    </style:style>
    <style:style style:name="Tableau1.A" style:family="table-column">
      <style:table-column-properties style:column-width="0.416cm"/>
    </style:style>
    <style:style style:name="Tableau1.B" style:family="table-column">
      <style:table-column-properties style:column-width="9.541cm"/>
    </style:style>
    <style:style style:name="Tableau1.C" style:family="table-column">
      <style:table-column-properties style:column-width="0.319cm"/>
    </style:style>
    <style:style style:name="Tableau1.D" style:family="table-column">
      <style:table-column-properties style:column-width="1.184cm"/>
    </style:style>
    <style:style style:name="Tableau1.1" style:family="table-row">
      <style:table-row-properties style:min-row-height="0.011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0.05pt solid #000000" fo:border-bottom="none"/>
    </style:style>
    <style:style style:name="Tableau1.B2" style:family="table-cell">
      <style:table-cell-properties fo:padding="0.097cm" fo:border-left="none" fo:border-right="none" fo:border-top="0.05pt solid #000000" fo:border-bottom="none"/>
    </style:style>
    <style:style style:name="Tableau1.D2" style:family="table-cell">
      <style:table-cell-properties fo:padding="0.097cm" fo:border-left="none" fo:border-right="0.05pt solid #000000" fo:border-top="0.05pt solid #000000" fo:border-bottom="none"/>
    </style:style>
    <style:style style:name="Tableau1.A3" style:family="table-cell">
      <style:table-cell-properties fo:padding="0.097cm" fo:border-left="0.05pt solid #000000" fo:border-right="none" fo:border-top="none" fo:border-bottom="none"/>
    </style:style>
    <style:style style:name="Tableau1.B3" style:family="table-cell">
      <style:table-cell-properties fo:padding="0.097cm" fo:border="none"/>
    </style:style>
    <style:style style:name="Tableau1.D3" style:family="table-cell">
      <style:table-cell-properties fo:padding="0.097cm" fo:border-left="none" fo:border-right="0.05pt solid #000000" fo:border-top="none" fo:border-bottom="none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none" fo:border-right="none" fo:border-top="none" fo:border-bottom="0.05pt solid #000000"/>
    </style:style>
    <style:style style:name="Tableau1.D4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9pt" officeooo:paragraph-rsid="0003bc2e" style:font-size-asian="9pt" style:font-size-complex="9pt"/>
    </style:style>
    <style:style style:name="P2" style:family="paragraph" style:parent-style-name="Standard">
      <style:text-properties style:font-name="Liberation Sans" fo:font-size="9pt" officeooo:rsid="000517a7" officeooo:paragraph-rsid="000517a7" style:font-size-asian="9pt" style:font-size-complex="9pt"/>
    </style:style>
    <style:style style:name="P3" style:family="paragraph" style:parent-style-name="Standard">
      <style:text-properties style:font-name="Liberation Sans" fo:font-size="9pt" officeooo:rsid="000517a7" officeooo:paragraph-rsid="0005bb57" style:font-size-asian="9pt" style:font-size-complex="9pt"/>
    </style:style>
    <style:style style:name="P4" style:family="paragraph" style:parent-style-name="Standard">
      <style:text-properties style:font-name="Liberation Sans" fo:font-size="9pt" officeooo:rsid="000517a7" officeooo:paragraph-rsid="000ef62d" style:font-size-asian="9pt" style:font-size-complex="9pt"/>
    </style:style>
    <style:style style:name="P5" style:family="paragraph" style:parent-style-name="Standard">
      <style:text-properties style:font-name="Liberation Sans" fo:font-size="9pt" officeooo:rsid="000517a7" officeooo:paragraph-rsid="000f4e11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9pt" officeooo:rsid="00032fbe" officeooo:paragraph-rsid="00032fbe" style:font-size-asian="9pt" style:font-size-complex="9pt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9pt" officeooo:rsid="00032fbe" officeooo:paragraph-rsid="0005e3a3" style:font-size-asian="9pt" style:font-size-complex="9pt"/>
    </style:style>
    <style:style style:name="P8" style:family="paragraph" style:parent-style-name="Standard">
      <style:text-properties style:font-name="Liberation Sans" fo:font-size="9pt" officeooo:paragraph-rsid="0005e3a3" style:font-size-asian="9pt" style:font-size-complex="9pt"/>
    </style:style>
    <style:style style:name="P9" style:family="paragraph" style:parent-style-name="Standard">
      <style:text-properties style:font-name="Liberation Sans" fo:font-size="9pt" officeooo:rsid="000ef62d" officeooo:paragraph-rsid="000ef62d" style:font-size-asian="9pt" style:font-size-complex="9pt"/>
    </style:style>
    <style:style style:name="P10" style:family="paragraph" style:parent-style-name="Standard">
      <style:text-properties style:font-name="Liberation Sans" fo:font-size="9pt" officeooo:rsid="000ef62d" officeooo:paragraph-rsid="000f4e11" style:font-size-asian="9pt" style:font-size-complex="9pt"/>
    </style:style>
    <style:style style:name="P11" style:family="paragraph" style:parent-style-name="Standard">
      <style:text-properties style:font-name="Liberation Sans" fo:font-size="9pt" officeooo:rsid="0005e3a3" officeooo:paragraph-rsid="000f4e11" style:font-size-asian="9pt" style:font-size-complex="9pt"/>
    </style:style>
    <style:style style:name="P12" style:family="paragraph" style:parent-style-name="Standard">
      <style:text-properties style:font-name="Liberation Sans" fo:font-size="9pt" officeooo:rsid="00107ee1" officeooo:paragraph-rsid="000f4e11" style:font-size-asian="9pt" style:font-size-complex="9pt"/>
    </style:style>
    <style:style style:name="P13" style:family="paragraph" style:parent-style-name="Standard">
      <style:text-properties style:font-name="Liberation Sans" fo:font-size="9pt" officeooo:rsid="00107ee1" officeooo:paragraph-rsid="00102626" style:font-size-asian="9pt" style:font-size-complex="9pt"/>
    </style:style>
    <style:style style:name="P14" style:family="paragraph" style:parent-style-name="Standard">
      <style:text-properties style:font-name="Liberation Sans" fo:font-size="9pt" officeooo:paragraph-rsid="000f4e11" style:font-size-asian="9pt" style:font-size-complex="9pt"/>
    </style:style>
    <style:style style:name="P15" style:family="paragraph" style:parent-style-name="Standard">
      <style:text-properties style:font-name="Liberation Sans" fo:font-size="9pt" officeooo:rsid="000f4e11" officeooo:paragraph-rsid="000f4e11" style:font-size-asian="9pt" style:font-size-complex="9pt"/>
    </style:style>
    <style:style style:name="P16" style:family="paragraph" style:parent-style-name="Standard">
      <style:text-properties style:font-name="Liberation Sans" fo:font-size="9pt" fo:font-weight="bold" officeooo:rsid="0005e3a3" officeooo:paragraph-rsid="0005e3a3" style:font-size-asian="9pt" style:font-weight-asian="bold" style:font-size-complex="9pt" style:font-weight-complex="bold"/>
    </style:style>
    <style:style style:name="P17" style:family="paragraph" style:parent-style-name="Standard">
      <style:text-properties style:font-name="Liberation Sans" fo:font-size="9pt" fo:font-weight="bold" officeooo:rsid="0005e3a3" officeooo:paragraph-rsid="000f4e11" style:font-size-asian="9pt" style:font-weight-asian="bold" style:font-size-complex="9pt" style:font-weight-complex="bold"/>
    </style:style>
    <style:style style:name="P18" style:family="paragraph" style:parent-style-name="Standard">
      <style:text-properties style:font-name="Liberation Sans" fo:font-size="9pt" fo:font-weight="bold" officeooo:rsid="00107ee1" officeooo:paragraph-rsid="000f4e11" style:font-size-asian="9pt" style:font-weight-asian="bold" style:font-size-complex="9pt" style:font-weight-complex="bold"/>
    </style:style>
    <style:style style:name="P19" style:family="paragraph" style:parent-style-name="Standard">
      <style:text-properties style:font-name="Liberation Sans" fo:font-size="9pt" fo:font-weight="normal" officeooo:rsid="00107ee1" officeooo:paragraph-rsid="000f4e11" style:font-size-asian="9pt" style:font-weight-asian="normal" style:font-size-complex="9pt" style:font-weight-complex="normal"/>
    </style:style>
    <style:style style:name="P20" style:family="paragraph" style:parent-style-name="Standard">
      <style:text-properties style:font-name="Liberation Sans" fo:font-size="9pt" fo:font-weight="normal" officeooo:rsid="000f4e11" officeooo:paragraph-rsid="000f4e11" style:font-size-asian="9pt" style:font-weight-asian="normal" style:font-size-complex="9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9pt" fo:font-weight="normal" officeooo:rsid="000f4e11" officeooo:paragraph-rsid="000f4e11" style:font-size-asian="9pt" style:font-weight-asian="normal" style:font-size-complex="9pt" style:font-weight-complex="normal"/>
    </style:style>
    <style:style style:name="P22" style:family="paragraph" style:parent-style-name="Standard">
      <style:text-properties style:font-name="Liberation Sans" fo:font-size="9pt" fo:font-weight="normal" officeooo:rsid="0011b339" officeooo:paragraph-rsid="0011b339" style:font-size-asian="9pt" style:font-weight-asian="normal" style:font-size-complex="9pt" style:font-weight-complex="normal"/>
    </style:style>
    <style:style style:name="P23" style:family="paragraph" style:parent-style-name="Table_20_Contents">
      <style:text-properties style:font-name="Liberation Sans" fo:font-size="9pt" officeooo:rsid="001e98fb" officeooo:paragraph-rsid="0005e3a3" style:font-size-asian="9pt" style:font-size-complex="9pt"/>
    </style:style>
    <style:style style:name="P24" style:family="paragraph" style:parent-style-name="Table_20_Contents">
      <style:text-properties style:font-name="Liberation Sans" fo:font-size="9pt" officeooo:rsid="002054e5" officeooo:paragraph-rsid="0005e3a3" style:font-size-asian="9pt" style:font-size-complex="9pt"/>
    </style:style>
    <style:style style:name="P25" style:family="paragraph" style:parent-style-name="Table_20_Contents">
      <style:text-properties style:font-name="Liberation Sans" fo:font-size="9pt" officeooo:paragraph-rsid="0005e3a3" style:font-size-asian="9pt" style:font-size-complex="9pt"/>
    </style:style>
    <style:style style:name="P26" style:family="paragraph" style:parent-style-name="Table_20_Contents">
      <style:text-properties style:font-name="Liberation Sans" fo:font-size="9pt" officeooo:rsid="000c999b" officeooo:paragraph-rsid="000c999b" style:font-size-asian="9pt" style:font-size-complex="9pt"/>
    </style:style>
    <style:style style:name="P27" style:family="paragraph" style:parent-style-name="Table_20_Contents">
      <style:text-properties style:font-name="Liberation Sans" fo:font-size="9pt" officeooo:rsid="00085cad" officeooo:paragraph-rsid="00085cad" style:font-size-asian="9pt" style:font-size-complex="9pt"/>
    </style:style>
    <style:style style:name="P28" style:family="paragraph" style:parent-style-name="Table_20_Contents">
      <style:text-properties style:font-name="Liberation Sans" fo:font-size="9pt" officeooo:paragraph-rsid="000d89ef" style:font-size-asian="9pt" style:font-size-complex="9pt"/>
    </style:style>
    <style:style style:name="P29" style:family="paragraph" style:parent-style-name="Table_20_Contents">
      <style:text-properties style:font-name="Liberation Sans" fo:font-size="9pt" officeooo:rsid="000d89ef" officeooo:paragraph-rsid="000d89ef" style:font-size-asian="9pt" style:font-size-complex="9pt"/>
    </style:style>
    <style:style style:name="P30" style:family="paragraph" style:parent-style-name="Table_20_Contents">
      <style:text-properties style:font-name="Liberation Sans" fo:font-size="9pt" officeooo:rsid="00107ee1" officeooo:paragraph-rsid="000f4e11" style:font-size-asian="9pt" style:font-size-complex="9pt"/>
    </style:style>
    <style:style style:name="P31" style:family="paragraph" style:parent-style-name="Standard">
      <style:text-properties style:font-name="Liberation Sans" fo:font-size="9pt" officeooo:rsid="000f4e11" officeooo:paragraph-rsid="000f4e11" style:font-size-asian="9pt" style:font-size-complex="9pt"/>
    </style:style>
    <style:style style:name="P32" style:family="paragraph">
      <style:paragraph-properties fo:margin-left="0cm" fo:margin-right="0cm" fo:margin-top="0.101cm" fo:margin-bottom="0.101cm" fo:line-height="100%" fo:text-align="start" fo:text-indent="0cm"/>
    </style:style>
    <style:style style:name="P33" style:family="paragraph">
      <loext:graphic-properties draw:fill="none" draw:fill-color="#729fcf"/>
      <style:paragraph-properties fo:margin-left="0cm" fo:margin-right="0cm" fo:margin-top="0.101cm" fo:margin-bottom="0.10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none" draw:fill-color="#729fcf"/>
      <style:paragraph-properties fo:margin-left="0cm" fo:margin-right="0cm" fo:margin-top="0.101cm" fo:margin-bottom="0.10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paragraph-properties fo:margin-left="0cm" fo:margin-right="0cm" fo:margin-top="0cm" fo:margin-bottom="0cm" fo:line-height="100%" fo:text-align="center" fo:text-indent="0cm"/>
    </style:style>
    <style:style style:name="P3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5bb57"/>
    </style:style>
    <style:style style:name="T2" style:family="text">
      <style:text-properties officeooo:rsid="000d89ef"/>
    </style:style>
    <style:style style:name="T3" style:family="text">
      <style:text-properties officeooo:rsid="000ef62d"/>
    </style:style>
    <style:style style:name="T4" style:family="text">
      <style:text-properties officeooo:rsid="000f4e11"/>
    </style:style>
    <style:style style:name="T5" style:family="text">
      <style:text-properties officeooo:rsid="00107ee1"/>
    </style:style>
    <style:style style:name="T6" style:family="text">
      <style:text-properties officeooo:rsid="00102626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Liberation Sans1" fo:font-size="9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3.124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2.74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2.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1.9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6cm" fo:min-width="2.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6.24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6cm" fo:min-width="6.24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style:run-through="foreground"/>
    </style:style>
    <style:style style:name="gr1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499cm" fo:min-width="5.9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51cm" fo:min-width="3.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499cm" fo:min-width="2.74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499cm" fo:min-width="3.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654cm" fo:min-width="2.65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499cm" fo:min-width="1.60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cm" svg:stroke-color="#ed1c2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499cm" fo:min-width="5.9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cm" svg:stroke-color="#ed1c24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cm" svg:stroke-color="#ed1c2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654cm" fo:min-width="2.65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cm" svg:stroke-color="#ed1c2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499cm" fo:min-width="1.603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g text:anchor-type="as-char" draw:z-index="3" draw:name="Forme1" draw:style-name="gr2"><draw:custom-shape draw:style-name="gr3" draw:text-style-name="P34" svg:width="3.25cm" svg:height="0.625cm" svg:x="0cm" svg:y="0cm"><text:p text:style-name="P32"><text:span text:style-name="T9">Date du document :</text:span></text:p><draw:enhanced-geometry svg:viewBox="0 0 21600 21600" draw:type="rectangle" draw:enhanced-path="M 0 0 L 21600 0 21600 21600 0 21600 0 0 Z N"/></draw:custom-shape><draw:custom-shape draw:style-name="gr4" draw:text-style-name="P34" svg:width="3.252cm" svg:height="0.625cm" svg:x="5.749cm" svg:y="0cm"><text:p text:style-name="P32"><text:span text:style-name="T9">Nom de la classe :</text:span></text:p><draw:enhanced-geometry svg:viewBox="0 0 21600 21600" draw:type="rectangle" draw:enhanced-path="M 0 0 L 21600 0 21600 21600 0 21600 0 0 Z N"/></draw:custom-shape><draw:custom-shape draw:style-name="gr5" draw:text-style-name="P34" svg:width="2.5cm" svg:height="0.625cm" svg:x="3.249cm" svg:y="0cm"><text:p text:style-name="P32"><text:span text:style-name="T9">16/07/2019</text:span></text:p><draw:enhanced-geometry svg:viewBox="0 0 21600 21600" draw:type="rectangle" draw:enhanced-path="M 0 0 L 21600 0 21600 21600 0 21600 0 0 Z N"/></draw:custom-shape><draw:custom-shape draw:style-name="gr6" draw:text-style-name="P34" svg:width="3.252cm" svg:height="0.627cm" svg:x="5.749cm" svg:y="0.624cm"><text:p text:style-name="P32"><text:span text:style-name="T9">Nom du fichier PHP :</text:span></text:p><draw:enhanced-geometry svg:viewBox="0 0 21600 21600" draw:type="rectangle" draw:enhanced-path="M 0 0 L 21600 0 21600 21600 0 21600 0 0 Z N"/></draw:custom-shape><draw:custom-shape draw:style-name="gr4" draw:text-style-name="P34" svg:width="3.252cm" svg:height="0.625cm" svg:x="5.749cm" svg:y="1.251cm"><text:p text:style-name="P32"><text:span text:style-name="T9">N° version :</text:span></text:p><draw:enhanced-geometry svg:viewBox="0 0 21600 21600" draw:type="rectangle" draw:enhanced-path="M 0 0 L 21600 0 21600 21600 0 21600 0 0 Z N"/></draw:custom-shape><draw:custom-shape draw:style-name="gr7" draw:text-style-name="P34" svg:width="6.751cm" svg:height="0.625cm" svg:x="8.999cm" svg:y="0cm"><text:p text:style-name="P32"><text:span text:style-name="T9">systeme\renderer\Renderer</text:span></text:p><draw:enhanced-geometry svg:viewBox="0 0 21600 21600" draw:type="rectangle" draw:enhanced-path="M 0 0 L 21600 0 21600 21600 0 21600 0 0 Z N"/></draw:custom-shape><draw:custom-shape draw:style-name="gr7" draw:text-style-name="P34" svg:width="6.751cm" svg:height="0.625cm" svg:x="8.999cm" svg:y="1.251cm"><text:p text:style-name="P32"><text:span text:style-name="T9">V1 [DEV]</text:span></text:p><draw:enhanced-geometry svg:viewBox="0 0 21600 21600" draw:type="rectangle" draw:enhanced-path="M 0 0 L 21600 0 21600 21600 0 21600 0 0 Z N"/></draw:custom-shape><draw:custom-shape draw:style-name="gr8" draw:text-style-name="P34" svg:width="6.751cm" svg:height="0.627cm" svg:x="8.999cm" svg:y="0.624cm"><text:p text:style-name="P32"><text:span text:style-name="T10">systeme\\renderer\\Renderer</text:span><text:span text:style-name="T9">.class.php</text:span></text:p><draw:enhanced-geometry svg:viewBox="0 0 21600 21600" draw:type="rectangle" draw:enhanced-path="M 0 0 L 21600 0 21600 21600 0 21600 0 0 Z N"/></draw:custom-shape></draw:g></text:p>
      <text:p text:style-name="P6"/>
      <text:p text:style-name="P1"><draw:custom-shape text:anchor-type="as-char" draw:z-index="0" draw:name="Forme2" draw:style-name="gr1" draw:text-style-name="P33" svg:width="3.626cm" svg:height="0.625cm"><text:p text:style-name="P32"><text:span text:style-name="T7">Instanciation</text:span></text:p><draw:enhanced-geometry svg:viewBox="0 0 21600 21600" draw:type="rectangle" draw:enhanced-path="M 0 0 L 21600 0 21600 21600 0 21600 0 0 Z N"/></draw:custom-shape></text:p>
      <text:p text:style-name="P1"/>
      <text:p text:style-name="P4">new Renderer ( <text:span text:style-name="T3">[</text:span>string $cheminParDefaut<text:span text:style-name="T3">]</text:span>):Route</text:p>
      <text:p text:style-name="P1"/>
      <text:p text:style-name="P16">Description.</text:p>
      <text:p text:style-name="P9">Le rendereur permet de <text:span text:style-name="T4">gérer</text:span> les vues.</text:p>
      <text:p text:style-name="P9">On peut <text:span text:style-name="T4">définir</text:span> une vue par une page HTML dans <text:span text:style-name="T4">la-quel</text:span> se trouve des variables (php) qui permet un affichage dynamique des pages web.</text:p>
      <text:p text:style-name="P9">Une vue est en faite un fichier php avec l’ensemble des codes html pour la mise en forme et et des variables php. </text:p>
      <text:p text:style-name="P9">La vue est donc caractérise par </text:p>
      <text:p text:style-name="P9"><text:tab/>-le chemin physique du fichier php (exple : c:\dossier\vue,php ).</text:p>
      <text:p text:style-name="P10"><text:tab/>-Un espace de nom composé du nom de l’application et de la fonction de l’application <text:span text:style-name="T4">séparé</text:span> d’un « # » : <text:tab/>nomApplication#nomFonctionApplication (exple : blog#index),<text:span text:style-name="T4">Quand l’espace de nom n’est pas renseigné, un <text:tab/>espace de nom par défaut représenté par la constante ESEPACE_NOM est appliqué.</text:span></text:p>
      <text:p text:style-name="P2"/>
      <text:p text:style-name="P16">Liste des paramètres.</text:p>
      <text:p text:style-name="P4">cheminParDefaut:</text:p>
      <text:p text:style-name="P3"><text:tab/><text:span text:style-name="T1">C</text:span>hemin de la route <text:span text:style-name="T1">(path) prend la forme nomApplication#nomFonction.</text:span><text:tab/></text:p>
      <text:p text:style-name="P2"/>
      <text:p text:style-name="P2"/>
      <text:p text:style-name="P8"><draw:custom-shape text:anchor-type="as-char" draw:z-index="2" draw:name="Forme2" draw:style-name="gr1" draw:text-style-name="P33" svg:width="3.626cm" svg:height="0.625cm"><text:p text:style-name="P32"><text:span text:style-name="T8">Utilisation</text:span></text:p><draw:enhanced-geometry svg:viewBox="0 0 21600 21600" draw:type="rectangle" draw:enhanced-path="M 0 0 L 21600 0 21600 21600 0 21600 0 0 Z N"/></draw:custom-shape></text:p>
      <text:p text:style-name="P8"/>
      <text:p text:style-name="P11">Les <text:s/><text:span text:style-name="T4">vue sont ajouté pendant l’instanciation du controleur d’application grace a la fonction ajoutChemin(CheminPhysiqueVue [, espaceDeNom ]).</text:span></text:p>
      <text:p text:style-name="P2"/>
      <text:p text:style-name="P7"><draw:custom-shape text:anchor-type="as-char" draw:z-index="1" draw:name="Forme2" draw:style-name="gr1" draw:text-style-name="P33" svg:width="3.626cm" svg:height="0.625cm"><text:p text:style-name="P32"><text:span text:style-name="T7">Diagramme de classe</text:span></text:p><draw:enhanced-geometry svg:viewBox="0 0 21600 21600" draw:type="rectangle" draw:enhanced-path="M 0 0 L 21600 0 21600 21600 0 21600 0 0 Z N"/></draw:custom-shape></text:p>
      <text:p text:style-name="P7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4" office:value-type="string">
            <text:p text:style-name="P25">Renderer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2" office:value-type="string">
            <text:p text:style-name="P26">+</text:p>
          </table:table-cell>
          <table:table-cell table:style-name="Tableau1.B2" office:value-type="string">
            <text:p text:style-name="P27">ESEPACE_NOM</text:p>
          </table:table-cell>
          <table:table-cell table:style-name="Tableau1.B2" office:value-type="string">
            <text:p text:style-name="P25">:</text:p>
          </table:table-cell>
          <table:table-cell table:style-name="Tableau1.D2" office:value-type="string">
            <text:p text:style-name="P26">Const</text:p>
          </table:table-cell>
        </table:table-row>
        <table:table-row table:style-name="Tableau1.1">
          <table:table-cell table:style-name="Tableau1.A3" office:value-type="string">
            <text:p text:style-name="P23">#</text:p>
          </table:table-cell>
          <table:table-cell table:style-name="Tableau1.B3" office:value-type="string">
            <text:p text:style-name="P25">cheminsDesVues</text:p>
          </table:table-cell>
          <table:table-cell table:style-name="Tableau1.B3" office:value-type="string">
            <text:p text:style-name="P25">:</text:p>
          </table:table-cell>
          <table:table-cell table:style-name="Tableau1.D3" office:value-type="string">
            <text:p text:style-name="P25">string<text:span text:style-name="T2">[]</text:span></text:p>
          </table:table-cell>
        </table:table-row>
        <table:table-row table:style-name="Tableau1.1">
          <table:table-cell table:style-name="Tableau1.A4" office:value-type="string">
            <text:p text:style-name="P23">#</text:p>
          </table:table-cell>
          <table:table-cell table:style-name="Tableau1.B4" office:value-type="string">
            <text:p text:style-name="P25">variablesGlobales</text:p>
          </table:table-cell>
          <table:table-cell table:style-name="Tableau1.B4" office:value-type="string">
            <text:p text:style-name="P25">:</text:p>
          </table:table-cell>
          <table:table-cell table:style-name="Tableau1.D4" office:value-type="string">
            <text:p text:style-name="P29">array</text:p>
          </table:table-cell>
        </table:table-row>
        <table:table-row table:style-name="Tableau1.1">
          <table:table-cell table:style-name="Tableau1.A2" office:value-type="string">
            <text:p text:style-name="P24">+</text:p>
          </table:table-cell>
          <table:table-cell table:style-name="Tableau1.B2" office:value-type="string">
            <text:p text:style-name="P25">getChemin()</text:p>
          </table:table-cell>
          <table:table-cell table:style-name="Tableau1.B2" office:value-type="string">
            <text:p text:style-name="P25">:</text:p>
          </table:table-cell>
          <table:table-cell table:style-name="Tableau1.D2" office:value-type="string">
            <text:p text:style-name="P28">string<text:span text:style-name="T2">[]</text:span></text:p>
          </table:table-cell>
        </table:table-row>
        <table:table-row table:style-name="Tableau1.1">
          <table:table-cell table:style-name="Tableau1.A3" office:value-type="string">
            <text:p text:style-name="P24">+</text:p>
          </table:table-cell>
          <table:table-cell table:style-name="Tableau1.B3" office:value-type="string">
            <text:p text:style-name="P25">ajoutChemin(string CheminPhysiqueVue <text:span text:style-name="T2">[</text:span>, string espaceDeNom <text:span text:style-name="T2">]</text:span>)</text:p>
          </table:table-cell>
          <table:table-cell table:style-name="Tableau1.B3" office:value-type="string">
            <text:p text:style-name="P25">:</text:p>
          </table:table-cell>
          <table:table-cell table:style-name="Tableau1.D3" office:value-type="string">
            <text:p text:style-name="P29">void</text:p>
          </table:table-cell>
        </table:table-row>
        <table:table-row table:style-name="Tableau1.1">
          <table:table-cell table:style-name="Tableau1.A3" office:value-type="string">
            <text:p text:style-name="P24">+</text:p>
          </table:table-cell>
          <table:table-cell table:style-name="Tableau1.B3" office:value-type="string">
            <text:p text:style-name="P25">ajoutVariableGlobal(string $nomVariable,$valeurVariable)</text:p>
          </table:table-cell>
          <table:table-cell table:style-name="Tableau1.B3" office:value-type="string">
            <text:p text:style-name="P25">:</text:p>
          </table:table-cell>
          <table:table-cell table:style-name="Tableau1.D3" office:value-type="string">
            <text:p text:style-name="P29">void</text:p>
          </table:table-cell>
        </table:table-row>
        <table:table-row table:style-name="Tableau1.1">
          <table:table-cell table:style-name="Tableau1.A4" office:value-type="string">
            <text:p text:style-name="P24">+</text:p>
          </table:table-cell>
          <table:table-cell table:style-name="Tableau1.B4" office:value-type="string">
            <text:p text:style-name="P25">render(string $nomDeVue <text:span text:style-name="T2">[</text:span>, array $variables <text:span text:style-name="T2">]</text:span> )</text:p>
          </table:table-cell>
          <table:table-cell table:style-name="Tableau1.B4" office:value-type="string">
            <text:p text:style-name="P25">:</text:p>
          </table:table-cell>
          <table:table-cell table:style-name="Tableau1.D4" office:value-type="string">
            <text:p text:style-name="P29">string</text:p>
          </table:table-cell>
        </table:table-row>
      </table:table>
      <text:p text:style-name="P8"/>
      <text:p text:style-name="P12">La methode <text:s/><text:span text:style-name="T4">ajoutChemin</text:span></text:p>
      <text:p text:style-name="P12"/>
      <text:p text:style-name="P30">ajoutChemin(string CheminPhysiqueVue <text:span text:style-name="T2">[</text:span>, string espaceDeNom <text:span text:style-name="T2">]</text:span>)</text:p>
      <text:p text:style-name="P14"/>
      <text:p text:style-name="P17">Description.</text:p>
      <text:p text:style-name="P12"/>
      <text:p text:style-name="P15">Ajoute une vue dans la liste des vue du Renderer ( tableau cheminsDesVues)</text:p>
      <text:p text:style-name="P5"/>
      <text:p text:style-name="P17">Liste des paramètres.</text:p>
      <text:p text:style-name="P17"/>
      <text:p text:style-name="P5"><text:span text:style-name="T5">CheminPhysiqueVue</text:span>:</text:p>
      <text:p text:style-name="P5"><text:tab/><text:span text:style-name="T4">Comme son nom l’indique c’est la chemin physique sur le disque de la vue </text:span></text:p>
      <text:p text:style-name="P5"><text:tab/><text:span text:style-name="T4">exemple:Racine\\DossierApplication\\vue\\fonction,php</text:span></text:p>
      <text:p text:style-name="P5"/>
      <text:p text:style-name="P5"><text:span text:style-name="T5">espaceDeNom</text:span>:</text:p>
      <text:p text:style-name="P5"><text:tab/><text:span text:style-name="T4">Par défaut elle est definie par la constante ESEPACE_NOM.</text:span></text:p>
      <text:p text:style-name="P15"><text:tab/>Si non l’espace de nom doit etre formaté comme ceux-ci : nom de l’application + # + nom de la fonction de l’application → nomApplication#nomFonctionApplication </text:p>
      <text:p text:style-name="P18"/>
      <text:p text:style-name="P18">Valeur de retour.</text:p>
      <text:p text:style-name="P5"><text:tab/><text:span text:style-name="T4">Aucune valeur de retoure.</text:span></text:p>
      <text:p text:style-name="P18"><text:soft-page-break/></text:p>
      <text:p text:style-name="P18">Fonctionnement.</text:p>
      <text:p text:style-name="P19"/>
      <text:p text:style-name="P20">[…]</text:p>
      <text:p text:style-name="P20"/>
      <text:p text:style-name="P13">La methode <text:s/>render</text:p>
      <text:p text:style-name="P12"/>
      <text:p text:style-name="P30">render(string nomDeVue <text:span text:style-name="T2">[</text:span>, array variables <text:span text:style-name="T2">]</text:span> ):s<text:span text:style-name="T6">trig</text:span></text:p>
      <text:p text:style-name="P14"/>
      <text:p text:style-name="P17">Description.</text:p>
      <text:p text:style-name="P12"/>
      <text:p text:style-name="P15">Ajoute une vue dans la liste des vue du Renderer ( tableau cheminsDesVues)</text:p>
      <text:p text:style-name="P5"/>
      <text:p text:style-name="P17">Liste des paramètres.</text:p>
      <text:p text:style-name="P17"/>
      <text:p text:style-name="P5"><text:span text:style-name="T5">nomDeVue</text:span>:</text:p>
      <text:p text:style-name="P5"><text:tab/><text:span text:style-name="T4">Nom de la vue : « nomApplication#nomFonctionApplication »</text:span></text:p>
      <text:p text:style-name="P5"/>
      <text:p text:style-name="P5"><text:span text:style-name="T5">variables</text:span>:</text:p>
      <text:p text:style-name="P5"><text:tab/><text:span text:style-name="T4">Liste des variables que la vue doit afficher</text:span></text:p>
      <text:p text:style-name="P18"/>
      <text:p text:style-name="P18">Valeur de retour.</text:p>
      <text:p text:style-name="P5"><text:tab/><text:span text:style-name="T6">Cette méthode renvoie une chaîne de caractères qui est en faite le code html de la page a afficher.</text:span></text:p>
      <text:p text:style-name="P18"/>
      <text:p text:style-name="P18">Fonctionnement.</text:p>
      <text:p text:style-name="P19"/>
      <text:p text:style-name="P21"><draw:g text:anchor-type="as-char" draw:z-index="4" draw:name="Forme3" draw:style-name="gr2"><draw:g draw:style-name="gr9"><draw:custom-shape draw:style-name="gr10" draw:text-style-name="P36" svg:width="6.501cm" svg:height="0.75cm" svg:x="0cm" svg:y="1.251cm"><text:p text:style-name="P35"><text:span text:style-name="T11">$res= [nomApplication,nomFonctionApplication</text:span></text:p><draw:enhanced-geometry svg:viewBox="0 0 21600 21600" draw:type="rectangle" draw:enhanced-path="M 0 0 L 21600 0 21600 21600 0 21600 0 0 Z N"/></draw:custom-shape><draw:custom-shape draw:style-name="gr11" draw:text-style-name="P36" svg:width="4.001cm" svg:height="0.761cm" svg:x="1.249cm" svg:y="2.499cm"><text:p text:style-name="P35"><text:span text:style-name="T11">Début ob_start()</text:span></text:p><draw:enhanced-geometry svg:viewBox="0 0 21600 21600" draw:type="rectangle" draw:enhanced-path="M 0 0 L 21600 0 21600 21600 0 21600 0 0 Z N"/></draw:custom-shape><draw:custom-shape draw:style-name="gr12" draw:text-style-name="P36" svg:width="3.25cm" svg:height="0.75cm" svg:x="1.625cm" svg:y="3.75cm"><text:p text:style-name="P35"><text:span text:style-name="T11">Recherche de la vue</text:span></text:p><draw:enhanced-geometry svg:viewBox="0 0 21600 21600" draw:type="rectangle" draw:enhanced-path="M 0 0 L 21600 0 21600 21600 0 21600 0 0 Z N"/></draw:custom-shape><draw:line draw:style-name="gr13" draw:text-style-name="P37" svg:x1="3.249cm" svg:y1="0.75cm" svg:x2="3.249cm" svg:y2="1.25cm"><text:p/></draw:line><draw:line draw:style-name="gr13" draw:text-style-name="P37" svg:x1="3.249cm" svg:y1="2cm" svg:x2="3.249cm" svg:y2="2.5cm"><text:p/></draw:line><draw:line draw:style-name="gr13" draw:text-style-name="P37" svg:x1="3.249cm" svg:y1="3.25cm" svg:x2="3.249cm" svg:y2="3.75cm"><text:p/></draw:line><draw:line draw:style-name="gr13" draw:text-style-name="P37" svg:x1="3.249cm" svg:y1="4.5cm" svg:x2="3.249cm" svg:y2="5cm"><text:p/></draw:line><draw:custom-shape draw:style-name="gr12" draw:text-style-name="P36" svg:width="3.25cm" svg:height="0.75cm" svg:x="1.625cm" svg:y="4.999cm"><text:p text:style-name="P35"><text:span text:style-name="T11">Préparation des variables</text:span></text:p><draw:enhanced-geometry svg:viewBox="0 0 21600 21600" draw:type="rectangle" draw:enhanced-path="M 0 0 L 21600 0 21600 21600 0 21600 0 0 Z N"/></draw:custom-shape><draw:line draw:style-name="gr13" draw:text-style-name="P37" svg:x1="3.249cm" svg:y1="5.749cm" svg:x2="3.249cm" svg:y2="6.249cm"><text:p/></draw:line><draw:custom-shape draw:style-name="gr12" draw:text-style-name="P36" svg:width="3.25cm" svg:height="0.75cm" svg:x="1.625cm" svg:y="6.249cm"><text:p text:style-name="P35"><text:span text:style-name="T11">Require(vue)</text:span></text:p><draw:enhanced-geometry svg:viewBox="0 0 21600 21600" draw:type="rectangle" draw:enhanced-path="M 0 0 L 21600 0 21600 21600 0 21600 0 0 Z N"/></draw:custom-shape><draw:line draw:style-name="gr13" draw:text-style-name="P37" svg:x1="3.249cm" svg:y1="6.999cm" svg:x2="3.249cm" svg:y2="7.499cm"><text:p/></draw:line><draw:custom-shape draw:style-name="gr14" draw:text-style-name="P36" svg:width="4.252cm" svg:height="0.75cm" svg:x="1.124cm" svg:y="7.5cm"><text:p text:style-name="P35"><text:span text:style-name="T11">Résultat = fin ob_get_clean()</text:span></text:p><draw:enhanced-geometry svg:viewBox="0 0 21600 21600" draw:type="rectangle" draw:enhanced-path="M 0 0 L 21600 0 21600 21600 0 21600 0 0 Z N"/></draw:custom-shape><draw:line draw:style-name="gr13" draw:text-style-name="P37" svg:x1="3.249cm" svg:y1="8.249cm" svg:x2="3.249cm" svg:y2="8.749cm"><text:p/></draw:line><draw:custom-shape draw:style-name="gr12" draw:text-style-name="P36" svg:width="3.25cm" svg:height="0.75cm" svg:x="1.625cm" svg:y="8.749cm"><text:p text:style-name="P35"><text:span text:style-name="T11">Retourne Résultat</text:span></text:p><draw:enhanced-geometry svg:viewBox="0 0 21600 21600" draw:type="rectangle" draw:enhanced-path="M 0 0 L 21600 0 21600 21600 0 21600 0 0 Z N"/></draw:custom-shape><draw:line draw:style-name="gr13" draw:text-style-name="P37" svg:x1="3.249cm" svg:y1="9.499cm" svg:x2="3.249cm" svg:y2="9.999cm"><text:p/></draw:line><draw:custom-shape draw:style-name="gr15" draw:text-style-name="P36" svg:width="3.25cm" svg:height="1.001cm" svg:x="1.625cm" svg:y="9.999cm"><text:p text:style-name="P35"><text:span text:style-name="T11">fi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6" draw:text-style-name="P37" svg:width="2.751cm" svg:height="0.75cm" svg:x="1.875cm" svg:y="0cm"><text:p text:style-name="P35"><text:span text:style-name="T12">render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/draw:g><draw:g draw:style-name="gr9"><draw:custom-shape draw:style-name="gr17" draw:text-style-name="P36" svg:width="6.501cm" svg:height="0.75cm" svg:x="7.999cm" svg:y="3.126cm"><text:p text:style-name="P35"><text:span text:style-name="T11">PRÉPARATION DES VUES</text:span></text:p><draw:enhanced-geometry svg:viewBox="0 0 21600 21600" draw:type="rectangle" draw:enhanced-path="M 0 0 L 21600 0 21600 21600 0 21600 0 0 Z N"/></draw:custom-shape><draw:line draw:style-name="gr18" draw:text-style-name="P37" svg:x1="11.249cm" svg:y1="2.625cm" svg:x2="11.249cm" svg:y2="3.125cm"><text:p/></draw:line><draw:line draw:style-name="gr18" draw:text-style-name="P37" svg:x1="11.249cm" svg:y1="3.875cm" svg:x2="11.249cm" svg:y2="4.375cm"><text:p/></draw:line><draw:custom-shape draw:style-name="gr19" draw:text-style-name="P36" svg:width="3.252cm" svg:height="1.001cm" svg:x="9.624cm" svg:y="8.124cm"><text:p text:style-name="P35"><text:span text:style-name="T11">fi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0" draw:text-style-name="P37" svg:width="2.751cm" svg:height="0.75cm" svg:x="9.874cm" svg:y="1.875cm"><text:p text:style-name="P35"><text:span text:style-name="T12">render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ustom-shape draw:style-name="gr17" draw:text-style-name="P36" svg:width="6.501cm" svg:height="0.75cm" svg:x="7.999cm" svg:y="4.374cm"><text:p text:style-name="P35"><text:span text:style-name="T11">PRÉPARATION DES VARIABLES</text:span></text:p><draw:enhanced-geometry svg:viewBox="0 0 21600 21600" draw:type="rectangle" draw:enhanced-path="M 0 0 L 21600 0 21600 21600 0 21600 0 0 Z N"/></draw:custom-shape><draw:line draw:style-name="gr18" draw:text-style-name="P37" svg:x1="11.249cm" svg:y1="5.124cm" svg:x2="11.249cm" svg:y2="5.624cm"><text:p/></draw:line><draw:custom-shape draw:style-name="gr17" draw:text-style-name="P36" svg:width="6.501cm" svg:height="0.75cm" svg:x="7.999cm" svg:y="5.625cm"><text:p text:style-name="P35"><text:span text:style-name="T11">MISE EN CACHE DE LA PAGE</text:span></text:p><draw:enhanced-geometry svg:viewBox="0 0 21600 21600" draw:type="rectangle" draw:enhanced-path="M 0 0 L 21600 0 21600 21600 0 21600 0 0 Z N"/></draw:custom-shape><draw:line draw:style-name="gr18" draw:text-style-name="P37" svg:x1="11.249cm" svg:y1="6.374cm" svg:x2="11.249cm" svg:y2="6.874cm"><text:p/></draw:line><draw:custom-shape draw:style-name="gr17" draw:text-style-name="P36" svg:width="6.501cm" svg:height="0.75cm" svg:x="7.999cm" svg:y="6.874cm"><text:p text:style-name="P35"><text:span text:style-name="T11">RENDU DU CACHE</text:span></text:p><draw:enhanced-geometry svg:viewBox="0 0 21600 21600" draw:type="rectangle" draw:enhanced-path="M 0 0 L 21600 0 21600 21600 0 21600 0 0 Z N"/></draw:custom-shape><draw:line draw:style-name="gr18" draw:text-style-name="P37" svg:x1="11.249cm" svg:y1="7.624cm" svg:x2="11.249cm" svg:y2="8.124cm"><text:p/></draw:line></draw:g></draw:g></text:p>
      <text:p text:style-name="P21"/>
      <text:p text:style-name="P22">[...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04:16:39.396000000</meta:creation-date>
    <dc:date>2019-08-13T06:56:28.704000000</dc:date>
    <meta:editing-duration>PT1H39M58S</meta:editing-duration>
    <meta:editing-cycles>9</meta:editing-cycles>
    <meta:generator>LibreOffice/5.4.6.2$Windows_X86_64 LibreOffice_project/4014ce260a04f1026ba855d3b8d91541c224eab8</meta:generator>
    <meta:document-statistic meta:table-count="1" meta:image-count="0" meta:object-count="0" meta:page-count="2" meta:paragraph-count="74" meta:word-count="346" meta:character-count="2324" meta:non-whitespace-character-count="2026"/>
  </office:meta>
</office:document-meta>
</file>