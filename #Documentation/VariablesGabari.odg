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E2000033F7000023665D2DAF679711025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2.37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fill="none" draw:textarea-vertical-align="top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bottom"/>
    </style:style>
    <style:style style:name="gr7" style:family="graphic" style:parent-style-name="standard">
      <style:graphic-properties draw:textarea-horizontal-align="justify" draw:textarea-vertical-align="top" draw:auto-grow-height="false" fo:min-height="3.125cm" fo:min-width="2.125cm"/>
    </style:style>
    <style:style style:name="gr8" style:family="graphic" style:parent-style-name="standard">
      <style:graphic-properties draw:textarea-horizontal-align="justify" draw:textarea-vertical-align="top" draw:auto-grow-height="false" fo:min-height="1cm" fo:min-width="4.25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493cm" fo:min-width="0.232cm"/>
    </style:style>
    <style:style style:name="gr10" style:family="graphic" style:parent-style-name="standard">
      <style:graphic-properties svg:stroke-opacity="0%" draw:fill="none" draw:fill-color="#ffffff" draw:textarea-horizontal-align="justify" draw:textarea-vertical-align="middle" draw:auto-grow-height="false" fo:min-height="0.481cm" fo:min-width="2.378cm"/>
    </style:style>
    <style:style style:name="gr11" style:family="graphic" style:parent-style-name="standard">
      <style:graphic-properties draw:fill-color="#006c3b" draw:textarea-horizontal-align="justify" draw:textarea-vertical-align="middle" draw:auto-grow-height="false" fo:min-height="0.493cm" fo:min-width="0.232cm"/>
    </style:style>
    <style:style style:name="gr12" style:family="graphic" style:parent-style-name="standard">
      <style:graphic-properties svg:stroke-opacity="0%" draw:fill="none" draw:fill-color="#ffffff" draw:textarea-horizontal-align="justify" draw:textarea-vertical-align="middle" draw:auto-grow-height="false" fo:min-height="0.482cm" fo:min-width="2.378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7.176cm" fo:min-width="15.323cm" style:protect="position siz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2.159cm" fo:min-width="2.25cm"/>
    </style:style>
    <style:style style:name="gr16" style:family="graphic" style:parent-style-name="standard">
      <style:graphic-properties svg:stroke-color="#000000" draw:fill="none" draw:textarea-horizontal-align="justify" draw:textarea-vertical-align="top" draw:auto-grow-height="false" fo:min-height="2.159cm" fo:min-width="2.2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438cm" fo:min-width="1.09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5cm" fo:min-width="1.62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6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64cm" fo:min-width="2.251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2.159cm" fo:min-width="2.2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216cm" fo:min-width="2.25cm"/>
    </style:style>
    <style:style style:name="gr23" style:family="graphic" style:parent-style-name="objectwithoutfill">
      <style:graphic-properties draw:marker-start="" draw:marker-end="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08cm"/>
    </style:style>
    <style:style style:name="gr25" style:family="graphic" style:parent-style-name="standard">
      <style:graphic-properties svg:stroke-color="#000000" draw:fill="none" draw:textarea-horizontal-align="justify" draw:textarea-vertical-align="top" draw:auto-grow-height="false" fo:min-height="0.534cm" fo:min-width="2.25cm"/>
    </style:style>
    <style:style style:name="gr26" style:family="graphic" style:parent-style-name="standard">
      <style:graphic-properties svg:stroke-color="#000000" draw:fill="none" draw:textarea-horizontal-align="justify" draw:textarea-vertical-align="top" draw:auto-grow-height="false" fo:min-height="2.159cm" fo:min-width="2.25cm"/>
    </style:style>
    <style:style style:name="P1" style:family="paragraph">
      <style:paragraph-properties fo:text-align="center"/>
      <style:text-properties style:font-name="Liberation Sans1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font-name="Liberation Sans1" fo:font-size="8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font-name="Liberation Sans1" fo:font-size="8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Liberation Sans1" fo:font-size="8pt" style:font-size-asian="8pt" style:font-size-complex="8pt"/>
    </style:style>
    <style:style style:name="P15" style:family="paragraph">
      <loext:graphic-properties draw:fill-color="#006c3b"/>
      <style:paragraph-properties fo:text-align="center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/>
      <style:text-properties style:font-name="Arial" fo:font-size="8pt" style:font-size-asian="8pt" style:font-size-complex="8pt"/>
    </style:style>
    <style:style style:name="P18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8pt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3.108cm" svg:height="0.79cm" svg:x="5.571cm" svg:y="1.553cm">
              <text:p text:style-name="P1"><text:span text:style-name="T1">CtrlApp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7.125cm" svg:y1="2.343cm" svg:x2="7.125cm" svg:y2="19.975cm">
              <text:p/>
            </draw:line>
          </draw:g>
          <draw:line draw:style-name="gr3" draw:text-style-name="P4" draw:layer="layout" svg:x1="7.172cm" svg:y1="3.822cm" svg:x2="10.5cm" svg:y2="3.822cm">
            <text:p text:style-name="P3"><text:span text:style-name="T2"/></text:p>
            <text:p text:style-name="P3"><text:span text:style-name="T2">fonctionCtrl($variables)</text:span></text:p>
          </draw:line>
          <draw:g>
            <draw:custom-shape draw:style-name="gr1" draw:text-style-name="P1" draw:layer="layout" svg:width="3.108cm" svg:height="0.79cm" svg:x="8.872cm" svg:y="1.554cm">
              <text:p text:style-name="P5"><text:span text:style-name="T3">Control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0.426cm" svg:y1="2.344cm" svg:x2="10.426cm" svg:y2="19.976cm">
              <text:p/>
            </draw:line>
          </draw:g>
          <draw:g>
            <draw:custom-shape draw:style-name="gr1" draw:text-style-name="P1" draw:layer="layout" svg:width="3.108cm" svg:height="0.79cm" svg:x="12.25cm" svg:y="1.579cm">
              <text:p text:style-name="P5"><text:span text:style-name="T3">Containe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3.804cm" svg:y1="2.369cm" svg:x2="13.804cm" svg:y2="20.001cm">
              <text:p/>
            </draw:line>
          </draw:g>
          <draw:line draw:style-name="gr3" draw:text-style-name="P4" draw:layer="layout" svg:x1="10.493cm" svg:y1="5.482cm" svg:x2="13.821cm" svg:y2="5.482cm">
            <text:p text:style-name="P3"><text:span text:style-name="T2"/></text:p>
            <text:p text:style-name="P3"><text:span text:style-name="T2"/></text:p>
          </draw:line>
          <draw:g>
            <draw:line draw:style-name="gr4" draw:text-style-name="P7" draw:layer="layout" svg:x1="13.75cm" svg:y1="5.5cm" svg:x2="15.5cm" svg:y2="5.5cm">
              <text:p text:style-name="P6"><text:span text:style-name="T4"/></text:p>
              <text:p text:style-name="P6"><text:span text:style-name="T4">ajoutDefinitionParFichier($fichierInit *)</text:span></text:p>
            </draw:line>
            <draw:line draw:style-name="gr5" draw:text-style-name="P7" draw:layer="layout" svg:x1="13.75cm" svg:y1="7cm" svg:x2="15.5cm" svg:y2="7cm">
              <text:p/>
            </draw:line>
            <draw:line draw:style-name="gr6" draw:text-style-name="P8" draw:layer="layout" svg:x1="15.5cm" svg:y1="5.5cm" svg:x2="15.5cm" svg:y2="7cm">
              <text:p/>
            </draw:line>
          </draw:g>
          <draw:g>
            <draw:line draw:style-name="gr4" draw:text-style-name="P7" draw:layer="layout" svg:x1="13.726cm" svg:y1="7.45cm" svg:x2="15.476cm" svg:y2="7.45cm">
              <text:p text:style-name="P6"><text:span text:style-name="T4"/></text:p>
              <text:p text:style-name="P6"><text:span text:style-name="T4">build()</text:span></text:p>
            </draw:line>
            <draw:line draw:style-name="gr5" draw:text-style-name="P7" draw:layer="layout" svg:x1="13.726cm" svg:y1="8.95cm" svg:x2="15.476cm" svg:y2="8.95cm">
              <text:p/>
            </draw:line>
            <draw:line draw:style-name="gr6" draw:text-style-name="P8" draw:layer="layout" svg:x1="15.476cm" svg:y1="7.45cm" svg:x2="15.476cm" svg:y2="8.95cm">
              <text:p/>
            </draw:line>
          </draw:g>
          <draw:g>
            <draw:line draw:style-name="gr4" draw:text-style-name="P7" draw:layer="layout" svg:x1="13.726cm" svg:y1="9.5cm" svg:x2="15.476cm" svg:y2="9.5cm">
              <text:p text:style-name="P6"><text:span text:style-name="T4"/></text:p>
              <text:p text:style-name="P6"><text:span text:style-name="T4">ajoutVariableGlobal(**)</text:span></text:p>
            </draw:line>
            <draw:line draw:style-name="gr5" draw:text-style-name="P7" draw:layer="layout" svg:x1="13.726cm" svg:y1="11cm" svg:x2="15.476cm" svg:y2="11cm">
              <text:p/>
            </draw:line>
            <draw:line draw:style-name="gr6" draw:text-style-name="P8" draw:layer="layout" svg:x1="15.476cm" svg:y1="9.5cm" svg:x2="15.476cm" svg:y2="11cm">
              <text:p/>
            </draw:line>
          </draw:g>
          <draw:custom-shape draw:style-name="gr7" draw:text-style-name="P10" draw:layer="layout" svg:width="2.625cm" svg:height="3.375cm" svg:x="17.125cm" svg:y="7.6cm">
            <text:p text:style-name="P9"><text:span text:style-name="T5">(**)</text:span></text:p>
            <text:p text:style-name="P9"><text:span text:style-name="T5"/></text:p>
            <text:p text:style-name="P9"><text:span text:style-name="T5">'titre'</text:span></text:p>
            <text:p text:style-name="P9"><text:span text:style-name="T5">'auteur'</text:span></text:p>
            <text:p text:style-name="P9"><text:span text:style-name="T5">‘</text:span><text:span text:style-name="T5">Description'</text:span></text:p>
            <text:p text:style-name="P9"><text:span text:style-name="T5">'motCle'</text:span></text:p>
            <text:p text:style-name="P9"><text:span text:style-name="T5">'fichiersCss',</text:span></text:p>
            <text:p text:style-name="P9"><text:span text:style-name="T5">'fichiersJavascript'</text:span></text:p>
            <text:p text:style-name="P9"><text:span text:style-name="T5">'liensMenu'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4.75cm" svg:height="1.25cm" svg:x="17.125cm" svg:y="5.35cm">
            <text:p text:style-name="P9"><text:span text:style-name="T5">(*)</text:span></text:p>
            <text:p text:style-name="P9"><text:span text:style-name="T5"/></text:p>
            <text:p text:style-name="P9"><text:span text:style-name="T5">Chemin du fichier de configuration </text:span></text:p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10.426cm" svg:y1="11.55cm" svg:x2="12.176cm" svg:y2="11.55cm">
              <text:p text:style-name="P6"><text:span text:style-name="T4"/></text:p>
              <text:p text:style-name="P6"><text:span text:style-name="T4">TRAITEMENT</text:span></text:p>
              <text:p text:style-name="P6"><text:span text:style-name="T4">DIVERS</text:span></text:p>
              <text:p text:style-name="P6"><text:span text:style-name="T4">VARIABLE </text:span></text:p>
            </draw:line>
            <draw:line draw:style-name="gr5" draw:text-style-name="P7" draw:layer="layout" svg:x1="10.426cm" svg:y1="13.05cm" svg:x2="12.176cm" svg:y2="13.05cm">
              <text:p/>
            </draw:line>
            <draw:line draw:style-name="gr6" draw:text-style-name="P8" draw:layer="layout" svg:x1="12.176cm" svg:y1="11.55cm" svg:x2="12.176cm" svg:y2="13.05cm">
              <text:p/>
            </draw:line>
          </draw:g>
          <draw:g>
            <draw:custom-shape draw:style-name="gr1" draw:text-style-name="P1" draw:layer="layout" svg:width="3.108cm" svg:height="0.79cm" svg:x="15.651cm" svg:y="1.579cm">
              <text:p text:style-name="P5"><text:span text:style-name="T3">rendere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7.205cm" svg:y1="2.369cm" svg:x2="17.205cm" svg:y2="20.001cm">
              <text:p/>
            </draw:line>
          </draw:g>
          <draw:line draw:style-name="gr3" draw:text-style-name="P4" draw:layer="layout" svg:x1="10.472cm" svg:y1="13.702cm" svg:x2="17.25cm" svg:y2="13.702cm">
            <text:p text:style-name="P3"><text:span text:style-name="T2"/></text:p>
            <text:p text:style-name="P3"><text:span text:style-name="T2">Render( nomApplication#nomFonction, $variables)</text:span></text:p>
          </draw:line>
          <draw:line draw:style-name="gr3" draw:text-style-name="P4" draw:layer="layout" svg:x1="13.721cm" svg:y1="10.982cm" svg:x2="10.393cm" svg:y2="10.982cm">
            <text:p text:style-name="P3"><text:span text:style-name="T2"/></text:p>
            <text:p text:style-name="P3"><text:span text:style-name="T2"/></text:p>
          </draw:line>
          <draw:g>
            <draw:line draw:style-name="gr4" draw:text-style-name="P7" draw:layer="layout" svg:x1="17.216cm" svg:y1="14.6cm" svg:x2="18.966cm" svg:y2="14.6cm">
              <text:p text:style-name="P6"><text:span text:style-name="T4"/></text:p>
              <text:p text:style-name="P6"><text:span text:style-name="T4"/></text:p>
              <text:p text:style-name="P6"><text:span text:style-name="T4">## PREPARATION DES VUES ##</text:span></text:p>
            </draw:line>
            <draw:line draw:style-name="gr5" draw:text-style-name="P7" draw:layer="layout" svg:x1="17.216cm" svg:y1="16.1cm" svg:x2="18.966cm" svg:y2="16.1cm">
              <text:p/>
            </draw:line>
            <draw:line draw:style-name="gr6" draw:text-style-name="P8" draw:layer="layout" svg:x1="18.966cm" svg:y1="14.6cm" svg:x2="18.966cm" svg:y2="16.1cm">
              <text:p/>
            </draw:line>
          </draw:g>
          <draw:g>
            <draw:line draw:style-name="gr4" draw:text-style-name="P7" draw:layer="layout" svg:x1="17.206cm" svg:y1="16.65cm" svg:x2="18.956cm" svg:y2="16.65cm">
              <text:p text:style-name="P6"><text:span text:style-name="T4"/></text:p>
              <text:p text:style-name="P6"><text:span text:style-name="T4"/></text:p>
              <text:p text:style-name="P6"><text:span text:style-name="T4">##PREPARATION DES VARIABLES##</text:span></text:p>
            </draw:line>
            <draw:line draw:style-name="gr5" draw:text-style-name="P7" draw:layer="layout" svg:x1="17.206cm" svg:y1="18.15cm" svg:x2="18.956cm" svg:y2="18.15cm">
              <text:p/>
            </draw:line>
            <draw:line draw:style-name="gr6" draw:text-style-name="P8" draw:layer="layout" svg:x1="18.956cm" svg:y1="16.65cm" svg:x2="18.956cm" svg:y2="18.15cm">
              <text:p/>
            </draw:line>
          </draw:g>
          <draw:g>
            <draw:custom-shape draw:style-name="gr9" draw:text-style-name="P11" draw:layer="layout" svg:width="1.036cm" svg:height="1.053cm" svg:x="3.881cm" svg:y="1.394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10" draw:text-style-name="P12" draw:layer="layout" svg:width="3.108cm" svg:height="0.789cm" svg:x="2.845cm" svg:y="1.552cm">
              <text:p text:style-name="P5"><text:span text:style-name="T1">Page html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7" draw:layer="layout" svg:x1="4.399cm" svg:y1="2.341cm" svg:x2="4.399cm" svg:y2="19.973cm">
              <text:p/>
            </draw:line>
          </draw:g>
          <draw:line draw:style-name="gr3" draw:text-style-name="P14" draw:layer="layout" svg:x1="17.222cm" svg:y1="18.882cm" svg:x2="4.375cm" svg:y2="18.857cm">
            <text:p text:style-name="P13"><text:span text:style-name="T6"/></text:p>
            <text:p text:style-name="P13"><text:span text:style-name="T5"># renvois la page codé en html</text:span></text:p>
          </draw:line>
          <draw:g>
            <draw:custom-shape draw:style-name="gr11" draw:text-style-name="P15" draw:layer="layout" svg:width="1.036cm" svg:height="1.053cm" svg:x="2.055cm" svg:y="1.394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12" draw:text-style-name="P17" draw:layer="layout" svg:width="3.108cm" svg:height="0.79cm" svg:x="1.019cm" svg:y="1.499cm">
              <text:p text:style-name="P16"><text:span text:style-name="T1">Rout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7" draw:layer="layout" svg:x1="2.573cm" svg:y1="2.289cm" svg:x2="2.573cm" svg:y2="19.921cm">
              <text:p/>
            </draw:line>
          </draw:g>
          <draw:line draw:style-name="gr3" draw:text-style-name="P4" draw:layer="layout" svg:x1="2.572cm" svg:y1="3.102cm" svg:x2="7.125cm" svg:y2="3.102cm">
            <text:p text:style-name="P3"><text:span text:style-name="T2"/></text:p>
            <text:p text:style-name="P3"><text:span text:style-name="T2">new Response(200,[],$ResultatExecution)</text:span></text:p>
          </draw:line>
          <draw:custom-shape draw:style-name="gr8" draw:text-style-name="P10" draw:layer="layout" svg:width="4.75cm" svg:height="1.25cm" svg:x="3.25cm" svg:y="5.25cm">
            <text:p text:style-name="P9"><text:span text:style-name="T5"/></text:p>
            <text:p text:style-name="P9"><text:span text:style-name="T5">$ResultatExecution = CtrlApp</text:span></text:p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6.5cm" svg:y1="3.5cm" svg:x2="6.375cm" svg:y2="3.625cm">
            <text:p/>
          </draw:line>
          <draw:line draw:style-name="gr2" draw:text-style-name="P7" draw:layer="layout" svg:x1="5.5cm" svg:y1="5.5cm" svg:x2="6.625cm" svg:y2="3.5cm">
            <text:p/>
          </draw:line>
        </draw:g>
        <draw:frame draw:style-name="gr13" draw:text-style-name="P5" draw:layer="layout" svg:width="8.775cm" svg:height="5.977cm" svg:x="20.325cm" svg:y="14.4cm">
          <draw:image xlink:href="Pictures/200000E2000033F7000023665D2DAF6797110258.svm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4" draw:text-style-name="P5" draw:layer="layout" svg:width="22.375cm" svg:height="10.5cm" svg:x="1.625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75cm" svg:height="2.409cm" svg:x="26cm" svg:y="0.875cm">
          <text:p text:style-name="P5"><text:span text:style-name="T5">-&gt;ru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2.75cm" svg:height="2.409cm" svg:x="0.625cm" svg:y="0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125cm" svg:height="1.375cm" svg:x="10.25cm" svg:y="9.12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7" draw:layer="layout" svg:width="2.125cm" svg:height="1.375cm" draw:transform="rotate (0.368962603871601) translate (17.447cm 12.916cm)">
            <text:p/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8" draw:layer="layout" svg:width="2.75cm" svg:height="2.409cm" svg:x="14.75cm" svg:y="13.804cm">
            <text:p text:style-name="P5"><text:span text:style-name="T5">CtrlApp-&gt;fon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2.75cm" svg:height="2.409cm" svg:x="25.3cm" svg:y="13.804cm">
            <text:p text:style-name="P5"><text:span text:style-name="T5">renderer-&gt;rend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2.75cm" svg:height="2.409cm" svg:x="19.906cm" svg:y="10.25cm">
            <text:p text:style-name="P5"><text:span text:style-name="T5">Controleur-&gt;initVarGlobal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2.75cm" svg:height="2.409cm" svg:x="19.906cm" svg:y="16.9cm">
            <text:p text:style-name="P5"><text:span text:style-name="T5">Page htm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2.125cm" svg:height="1.376cm" draw:transform="rotate (0.368962603871601) translate (22.8cm 12.915cm)">
            <text:p/>
            <draw:enhanced-geometry svg:viewBox="0 0 21600 21600" draw:mirror-horizontal="false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7" draw:layer="layout" svg:width="2.125cm" svg:height="1.376cm" draw:transform="rotate (0.368962603871601) translate (22.8cm 16.241cm)">
            <text:p/>
            <draw:enhanced-geometry svg:viewBox="0 0 21600 21600" draw:mirror-horizontal="true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0" draw:text-style-name="P8" draw:layer="layout" svg:width="2.75cm" svg:height="3.625cm" svg:x="2.126cm" svg:y="5.5cm">
            <text:p text:style-name="P5"><text:span text:style-name="T5">Variables</text:span><text:span text:style-name="T5"><text:line-break/></text:span><text:span text:style-name="T5">ConfigSysteme.php</text:span></text:p>
            <text:p text:style-name="P5"><text:span text:style-name="T5"/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1" draw:text-style-name="P7" draw:layer="layout" svg:width="2.75cm" svg:height="2.409cm" svg:x="5.876cm" svg:y="1.466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8" draw:layer="layout" svg:width="2.75cm" svg:height="0.466cm" svg:x="5.876cm" svg:y="1cm">
              <text:p text:style-name="P5"><text:span text:style-name="T5">Container()</text:span></text:p>
              <draw:enhanced-geometry svg:viewBox="0 0 21600 21600" draw:type="rectangle" draw:enhanced-path="M 0 0 L 21600 0 21600 21600 0 21600 0 0 Z N"/>
            </draw:custom-shape>
          </draw:g>
          <draw:line draw:style-name="gr23" draw:text-style-name="P7" draw:layer="layout" svg:x1="4.501cm" svg:y1="7cm" svg:x2="6.376cm" svg:y2="2.25cm">
            <text:p/>
          </draw:line>
          <draw:frame draw:style-name="gr24" draw:text-style-name="P19" draw:layer="layout" svg:width="3.808cm" svg:height="0.887cm" svg:x="5.376cm" svg:y="4.75cm">
            <draw:text-box>
              <text:p><text:span text:style-name="T5">AjoutDefinitionParFichier()</text:span></text:p>
              <text:p><text:span text:style-name="T5">build()</text:span></text:p>
            </draw:text-box>
          </draw:frame>
          <draw:line draw:style-name="gr2" draw:text-style-name="P7" draw:layer="layout" svg:x1="8.626cm" svg:y1="3.875cm" svg:x2="11.376cm" svg:y2="6.875cm">
            <text:p/>
          </draw:line>
          <draw:g>
            <draw:g>
              <draw:custom-shape draw:style-name="gr16" draw:text-style-name="P18" draw:layer="layout" svg:width="2.75cm" svg:height="2.409cm" svg:x="14.751cm" svg:y="6.8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8" draw:layer="layout" svg:width="2.75cm" svg:height="0.466cm" svg:x="14.751cm" svg:y="6.375cm">
                <text:p text:style-name="P5"><text:span text:style-name="T5">CtrlApp()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5" draw:text-style-name="P18" draw:layer="layout" svg:width="2.75cm" svg:height="0.784cm" svg:x="11.001cm" svg:y="6.591cm">
              <text:p text:style-name="P9"><text:span text:style-name="T5">_instanceContai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2.75cm" svg:height="0.466cm" svg:x="11.001cm" svg:y="6.125cm">
              <text:p text:style-name="P5"><text:span text:style-name="T5">Controleur()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2.75cm" svg:height="2.409cm" svg:x="11.001cm" svg:y="7.375cm">
              <text:p text:style-name="P9"><text:span text:style-name="T5">InitialisationVariables</text:span></text:p>
              <text:p text:style-name="P9"><text:span text:style-name="T5">GlobalesRenderr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09:37:04.253000000</meta:creation-date>
    <dc:date>2019-08-29T06:57:27.422000000</dc:date>
    <meta:editing-duration>PT1H35M50S</meta:editing-duration>
    <meta:editing-cycles>9</meta:editing-cycles>
    <meta:generator>LibreOffice/5.4.6.2$Windows_X86_64 LibreOffice_project/4014ce260a04f1026ba855d3b8d91541c224eab8</meta:generator>
    <meta:document-statistic meta:object-count="85"/>
  </office:meta>
</office:document-meta>
</file>