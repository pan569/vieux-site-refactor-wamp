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none" fo:border-right="none" fo:border-top="none" fo:border-bottom="0.05pt solid #000000"/>
    </style:style>
    <style:style style:name="Tableau1.D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officeooo:rsid="0006c1b6" officeooo:paragraph-rsid="0006c1b6" style:font-size-asian="9pt" style:font-size-complex="9pt"/>
    </style:style>
    <style:style style:name="P9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3" style:family="paragraph" style:parent-style-name="Standard">
      <style:text-properties style:font-name="Liberation Sans" fo:font-size="9pt" officeooo:rsid="000517a7" officeooo:paragraph-rsid="000fb4dc" style:font-size-asian="9pt" style:font-size-complex="9pt"/>
    </style:style>
    <style:style style:name="P14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15" style:family="paragraph" style:parent-style-name="Standard">
      <style:text-properties style:font-name="Liberation Sans" fo:font-size="9pt" officeooo:rsid="000517a7" officeooo:paragraph-rsid="0010986c" style:font-size-asian="9pt" style:font-size-complex="9pt"/>
    </style:style>
    <style:style style:name="P16" style:family="paragraph" style:parent-style-name="Standard">
      <style:text-properties style:font-name="Liberation Sans" fo:font-size="9pt" officeooo:rsid="0005e3a3" officeooo:paragraph-rsid="0010986c" style:font-size-asian="9pt" style:font-size-complex="9pt"/>
    </style:style>
    <style:style style:name="P17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8" style:family="paragraph" style:parent-style-name="Table_20_Contents">
      <style:text-properties style:font-name="Liberation Sans" fo:font-size="9pt" officeooo:paragraph-rsid="000aaaaf" style:font-size-asian="9pt" style:font-size-complex="9pt"/>
    </style:style>
    <style:style style:name="P19" style:family="paragraph" style:parent-style-name="Table_20_Contents">
      <style:text-properties style:font-name="Liberation Sans" fo:font-size="9pt" officeooo:paragraph-rsid="000c6f59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20efdf" officeooo:paragraph-rsid="000c6f59" style:font-size-asian="9pt" style:font-size-complex="9pt"/>
    </style:style>
    <style:style style:name="P21" style:family="paragraph">
      <style:paragraph-properties fo:margin-left="0cm" fo:margin-right="0cm" fo:margin-top="0.101cm" fo:margin-bottom="0.101cm" fo:line-height="100%" fo:text-align="start" fo:text-indent="0cm"/>
    </style:style>
    <style:style style:name="P22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c1b6"/>
    </style:style>
    <style:style style:name="T2" style:family="text">
      <style:text-properties officeooo:rsid="000dcb42"/>
    </style:style>
    <style:style style:name="T3" style:family="text">
      <style:text-properties officeooo:rsid="000fb4dc"/>
    </style:style>
    <style:style style:name="T4" style:family="text">
      <style:text-properties officeooo:rsid="0010986c"/>
    </style:style>
    <style:style style:name="T5" style:family="text">
      <style:text-properties officeooo:rsid="000517a7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23" svg:width="3.25cm" svg:height="0.625cm" svg:x="0cm" svg:y="0cm"><text:p text:style-name="P21"><text:span text:style-name="T8">Date du document :</text:span></text:p><draw:enhanced-geometry svg:viewBox="0 0 21600 21600" draw:type="rectangle" draw:enhanced-path="M 0 0 L 21600 0 21600 21600 0 21600 0 0 Z N"/></draw:custom-shape><draw:custom-shape draw:style-name="gr4" draw:text-style-name="P23" svg:width="3.252cm" svg:height="0.625cm" svg:x="5.749cm" svg:y="0cm"><text:p text:style-name="P21"><text:span text:style-name="T8">Nom de la classe :</text:span></text:p><draw:enhanced-geometry svg:viewBox="0 0 21600 21600" draw:type="rectangle" draw:enhanced-path="M 0 0 L 21600 0 21600 21600 0 21600 0 0 Z N"/></draw:custom-shape><draw:custom-shape draw:style-name="gr5" draw:text-style-name="P23" svg:width="2.5cm" svg:height="0.625cm" svg:x="3.249cm" svg:y="0cm"><text:p text:style-name="P21"><text:span text:style-name="T8">15/07/2019</text:span></text:p><draw:enhanced-geometry svg:viewBox="0 0 21600 21600" draw:type="rectangle" draw:enhanced-path="M 0 0 L 21600 0 21600 21600 0 21600 0 0 Z N"/></draw:custom-shape><draw:custom-shape draw:style-name="gr6" draw:text-style-name="P23" svg:width="3.252cm" svg:height="0.627cm" svg:x="5.749cm" svg:y="0.624cm"><text:p text:style-name="P21"><text:span text:style-name="T8">Nom du fichier PHP :</text:span></text:p><draw:enhanced-geometry svg:viewBox="0 0 21600 21600" draw:type="rectangle" draw:enhanced-path="M 0 0 L 21600 0 21600 21600 0 21600 0 0 Z N"/></draw:custom-shape><draw:custom-shape draw:style-name="gr7" draw:text-style-name="P23" svg:width="3.252cm" svg:height="0.625cm" svg:x="5.749cm" svg:y="1.251cm"><text:p text:style-name="P21"><text:span text:style-name="T8">N° version :</text:span></text:p><draw:enhanced-geometry svg:viewBox="0 0 21600 21600" draw:type="rectangle" draw:enhanced-path="M 0 0 L 21600 0 21600 21600 0 21600 0 0 Z N"/></draw:custom-shape><draw:custom-shape draw:style-name="gr8" draw:text-style-name="P23" svg:width="6.751cm" svg:height="0.625cm" svg:x="8.999cm" svg:y="0cm"><text:p text:style-name="P21"><text:span text:style-name="T8">systeme\routeur\RouteResultat</text:span></text:p><draw:enhanced-geometry svg:viewBox="0 0 21600 21600" draw:type="rectangle" draw:enhanced-path="M 0 0 L 21600 0 21600 21600 0 21600 0 0 Z N"/></draw:custom-shape><draw:custom-shape draw:style-name="gr9" draw:text-style-name="P23" svg:width="6.751cm" svg:height="0.625cm" svg:x="8.999cm" svg:y="1.251cm"><text:p text:style-name="P21"><text:span text:style-name="T8">V1 [DEV]</text:span></text:p><draw:enhanced-geometry svg:viewBox="0 0 21600 21600" draw:type="rectangle" draw:enhanced-path="M 0 0 L 21600 0 21600 21600 0 21600 0 0 Z N"/></draw:custom-shape><draw:custom-shape draw:style-name="gr10" draw:text-style-name="P23" svg:width="6.751cm" svg:height="0.627cm" svg:x="8.999cm" svg:y="0.624cm"><text:p text:style-name="P21"><text:span text:style-name="T8">systeme\\routeur\\RouteResultat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22" svg:width="3.626cm" svg:height="0.625cm"><text:p text:style-name="P21"><text:span text:style-name="T6">Instanciation</text:span></text:p><draw:enhanced-geometry svg:viewBox="0 0 21600 21600" draw:type="rectangle" draw:enhanced-path="M 0 0 L 21600 0 21600 21600 0 21600 0 0 Z N"/></draw:custom-shape></text:p>
      <text:p text:style-name="P1"/>
      <text:p text:style-name="P15">new RouteResultat (string $urlRequette, string $methodeRequette<text:span text:style-name="T2">[</text:span>, array $post<text:span text:style-name="T2">]</text:span>):RouteResultat</text:p>
      <text:p text:style-name="P1"/>
      <text:p text:style-name="P9">Description.</text:p>
      <text:p text:style-name="P15">RouteResultat <text:span text:style-name="T4">est est le resultat de la fonction Routeur.match().</text:span></text:p>
      <text:p text:style-name="P15"><text:tab/><text:span text:style-name="T4">Si la route est matché, la propriété succès est a true,</text:span></text:p>
      <text:p text:style-name="P15">RouteResultat <text:span text:style-name="T4">permet de manipuler la route matché.</text:span></text:p>
      <text:p text:style-name="P2"/>
      <text:p text:style-name="P9">Liste des paramètres.</text:p>
      <text:p text:style-name="P13">urlRequette :</text:p>
      <text:p text:style-name="P3"><text:tab/><text:span text:style-name="T3">url de la requête.</text:span></text:p>
      <text:p text:style-name="P2"/>
      <text:p text:style-name="P13">methodeRequette:</text:p>
      <text:p text:style-name="P13"><text:tab/><text:span text:style-name="T3">methode de la <text:s/>requête.</text:span></text:p>
      <text:p text:style-name="P2"/>
      <text:p text:style-name="P13">post:</text:p>
      <text:p text:style-name="P2"><text:tab/><text:span text:style-name="T3">Liste des variable de la méthode si la <text:s/>méthode de la requête est POST.</text:span></text:p>
      <text:p text:style-name="P2"/>
      <text:p text:style-name="P7"><draw:custom-shape text:anchor-type="as-char" draw:z-index="2" draw:name="Forme2" draw:style-name="gr1" draw:text-style-name="P22" svg:width="3.626cm" svg:height="0.625cm"><text:p text:style-name="P21"><text:span text:style-name="T7">Utilisation</text:span></text:p><draw:enhanced-geometry svg:viewBox="0 0 21600 21600" draw:type="rectangle" draw:enhanced-path="M 0 0 L 21600 0 21600 21600 0 21600 0 0 Z N"/></draw:custom-shape></text:p>
      <text:p text:style-name="P7"/>
      <text:p text:style-name="P16"><text:span text:style-name="T5">RouteResultat …</text:span></text:p>
      <text:p text:style-name="P16"/>
      <text:p text:style-name="P6"><draw:custom-shape text:anchor-type="as-char" draw:z-index="1" draw:name="Forme2" draw:style-name="gr1" draw:text-style-name="P22" svg:width="3.626cm" svg:height="0.625cm"><text:p text:style-name="P21"><text:span text:style-name="T6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RouteResultat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0">#</text:p>
          </table:table-cell>
          <table:table-cell table:style-name="Tableau1.B2" office:value-type="string">
            <text:p text:style-name="P12">urlRequette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0">#</text:p>
          </table:table-cell>
          <table:table-cell table:style-name="Tableau1.B3" office:value-type="string">
            <text:p text:style-name="P12">methodeRequett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0">#</text:p>
          </table:table-cell>
          <table:table-cell table:style-name="Tableau1.B3" office:value-type="string">
            <text:p text:style-name="P12">variableRequette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array</text:p>
          </table:table-cell>
        </table:table-row>
        <table:table-row table:style-name="Tableau1.1">
          <table:table-cell table:style-name="Tableau1.A3" office:value-type="string">
            <text:p text:style-name="P10">#</text:p>
          </table:table-cell>
          <table:table-cell table:style-name="Tableau1.B3" office:value-type="string">
            <text:p text:style-name="P12">routeMatché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Route</text:p>
          </table:table-cell>
        </table:table-row>
        <table:table-row table:style-name="Tableau1.1">
          <table:table-cell table:style-name="Tableau1.A3" office:value-type="string">
            <text:p text:style-name="P10">#</text:p>
          </table:table-cell>
          <table:table-cell table:style-name="Tableau1.B3" office:value-type="string">
            <text:p text:style-name="P12">match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[]</text:p>
          </table:table-cell>
        </table:table-row>
        <table:table-row table:style-name="Tableau1.1">
          <table:table-cell table:style-name="Tableau1.A7" office:value-type="string">
            <text:p text:style-name="P10">#</text:p>
          </table:table-cell>
          <table:table-cell table:style-name="Tableau1.B7" office:value-type="string">
            <text:p text:style-name="P12">succès</text:p>
          </table:table-cell>
          <table:table-cell table:style-name="Tableau1.B7" office:value-type="string">
            <text:p text:style-name="P12">:</text:p>
          </table:table-cell>
          <table:table-cell table:style-name="Tableau1.D7" office:value-type="string">
            <text:p text:style-name="P18">bool</text:p>
          </table:table-cell>
        </table:table-row>
        <table:table-row table:style-name="Tableau1.1">
          <table:table-cell table:style-name="Tableau1.A2" office:value-type="string">
            <text:p text:style-name="P11">+</text:p>
          </table:table-cell>
          <table:table-cell table:style-name="Tableau1.B2" office:value-type="string">
            <text:p text:style-name="P12">getRoute()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9">Route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Path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PathPatern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9">string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VariablesPatern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20">array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Callback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|callable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Methode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array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getName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string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isSuccès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9">bool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matchRoute(Route $route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9">bool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isPathPater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bool</text:p>
          </table:table-cell>
        </table:table-row>
        <table:table-row table:style-name="Tableau1.1">
          <table:table-cell table:style-name="Tableau1.A3" office:value-type="string">
            <text:p text:style-name="P11">+</text:p>
          </table:table-cell>
          <table:table-cell table:style-name="Tableau1.B3" office:value-type="string">
            <text:p text:style-name="P12">isMethode(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2">bool</text:p>
          </table:table-cell>
        </table:table-row>
        <table:table-row table:style-name="Tableau1.1">
          <table:table-cell table:style-name="Tableau1.A7" office:value-type="string">
            <text:p text:style-name="P11">+</text:p>
          </table:table-cell>
          <table:table-cell table:style-name="Tableau1.B7" office:value-type="string">
            <text:p text:style-name="P12">execCallBack()</text:p>
          </table:table-cell>
          <table:table-cell table:style-name="Tableau1.B7" office:value-type="string">
            <text:p text:style-name="P12">:</text:p>
          </table:table-cell>
          <table:table-cell table:style-name="Tableau1.D7" office:value-type="string">
            <text:p text:style-name="P12">bool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6T07:08:49.311000000</dc:date>
    <meta:editing-duration>PT34M35S</meta:editing-duration>
    <meta:editing-cycles>7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90" meta:word-count="141" meta:character-count="836" meta:non-whitespace-character-count="775"/>
  </office:meta>
</office:document-meta>
</file>