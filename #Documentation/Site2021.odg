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/>
    <style:font-face style:name="Mangal1" svg:font-family="Mangal"/>
    <style:font-face style:name="Liberation Mono2" svg:font-family="'Liberation Mono', 'Courier New'" style:font-family-generic="modern" style:font-pitch="fixed"/>
    <style:font-face style:name="NSimSun2" svg:font-family="NSimSun" style:font-family-generic="modern" style:font-pitch="fixed"/>
    <style:font-face style:name="Arial2" svg:font-family="Arial" style:font-pitch="variable"/>
    <style:font-face style:name="Consolas1" svg:font-family="Consolas" style:font-pitch="variable"/>
    <style:font-face style:name="Mangal" svg:font-family="Mangal" style:font-pitch="variable"/>
    <style:font-face style:name="Microsoft YaHei1" svg:font-family="'Microsoft YaHei'" style:font-pitch="variable"/>
    <style:font-face style:name="SimSun1" svg:font-family="SimSun" style:font-pitch="variable"/>
    <style:font-face style:name="Liberation Mono1" svg:font-family="'Liberation Mono', 'Courier New'" style:font-family-generic="modern" style:font-pitch="variable"/>
    <style:font-face style:name="NSimSun1" svg:font-family="NSimSun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Liberation Serif2" svg:font-family="'Liberation Serif', 'Times New Roman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43cm" fo:min-width="2.278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 style:list-style-name="L1">
      <style:graphic-properties svg:stroke-color="#000000" draw:fill="solid" draw:fill-color="#ffffff" draw:textarea-horizontal-align="justify" draw:textarea-vertical-align="top" draw:auto-grow-height="false" fo:min-height="3.137cm" fo:min-width="2.497cm"/>
      <style:paragraph-properties style:writing-mode="lr-tb"/>
    </style:style>
    <style:style style:name="gr4" style:family="graphic" style:parent-style-name="standard" style:list-style-name="L1">
      <style:graphic-properties svg:stroke-color="#000000" draw:fill="solid" draw:fill-color="#ffffff" draw:textarea-horizontal-align="justify" draw:textarea-vertical-align="top" draw:auto-grow-height="false" fo:min-height="3.137cm" fo:min-width="2.497cm"/>
      <style:paragraph-properties style:writing-mode="lr-tb"/>
    </style:style>
    <style:style style:name="gr5" style:family="graphic" style:parent-style-name="standard" style:list-style-name="L1">
      <style:graphic-properties svg:stroke-color="#000000" draw:fill="solid" draw:fill-color="#ffffff" draw:textarea-horizontal-align="justify" draw:textarea-vertical-align="top" draw:auto-grow-height="false" fo:min-height="3.137cm" fo:min-width="2.497cm"/>
      <style:paragraph-properties style:writing-mode="lr-tb"/>
    </style:style>
    <style:style style:name="gr6" style:family="graphic" style:parent-style-name="standard">
      <style:graphic-properties svg:stroke-color="#ed1c24" draw:fill="none" draw:textarea-horizontal-align="justify" draw:textarea-vertical-align="top" draw:auto-grow-height="false" fo:min-height="0.275cm" fo:min-width="4.076cm"/>
      <style:paragraph-properties style:writing-mode="lr-tb"/>
    </style:style>
    <style:style style:name="gr7" style:family="graphic" style:parent-style-name="objectwithoutfill">
      <style:graphic-properties svg:stroke-color="#ed1c24" draw:marker-end="Arrow" draw:fill="none" draw:textarea-vertical-align="middle"/>
    </style:style>
    <style:style style:name="gr8" style:family="graphic" style:parent-style-name="standard">
      <style:graphic-properties svg:stroke-color="#ed1c24" draw:fill="none" draw:textarea-horizontal-align="justify" draw:textarea-vertical-align="middle" draw:auto-grow-height="false" fo:min-height="0.501cm" fo:min-width="1.604cm"/>
      <style:paragraph-properties style:writing-mode="lr-tb"/>
    </style:style>
    <style:style style:name="gr9" style:family="graphic" style:parent-style-name="standard">
      <style:graphic-properties svg:stroke-color="#ed1c24" draw:fill="none" draw:textarea-horizontal-align="justify" draw:textarea-vertical-align="top" draw:auto-grow-height="false" fo:min-height="0.273cm" fo:min-width="4.076cm"/>
      <style:paragraph-properties style:writing-mode="lr-tb"/>
    </style:style>
    <style:style style:name="gr10" style:family="graphic" style:parent-style-name="objectwithoutfill">
      <style:graphic-properties svg:stroke-color="#ed1c24" draw:marker-end="Arrow" draw:fill="none" draw:textarea-vertical-align="top"/>
    </style:style>
    <style:style style:name="gr11" style:family="graphic" style:parent-style-name="standard">
      <style:graphic-properties svg:stroke-color="#ed1c24" draw:fill="none" draw:textarea-horizontal-align="justify" draw:textarea-vertical-align="top" draw:auto-grow-height="false" fo:min-height="0.221cm" fo:min-width="4.076cm"/>
      <style:paragraph-properties style:writing-mode="lr-tb"/>
    </style:style>
    <style:style style:name="gr12" style:family="graphic" style:parent-style-name="objectwithoutfill">
      <style:graphic-properties draw:stroke="solid" svg:stroke-color="#ed1c24" draw:marker-start="" draw:marker-end="" draw:fill="none" draw:textarea-vertical-align="middle"/>
    </style:style>
    <style:style style:name="gr13" style:family="graphic" style:parent-style-name="objectwithoutfill">
      <style:graphic-properties svg:stroke-color="#c9211e" draw:fill="none" draw:textarea-vertical-align="middle"/>
    </style:style>
    <style:style style:name="gr14" style:family="graphic" style:parent-style-name="objectwithoutfill">
      <style:graphic-properties svg:stroke-color="#ed1c24" draw:marker-end="" draw:fill="none" draw:textarea-vertical-align="top"/>
    </style:style>
    <style:style style:name="gr15" style:family="graphic" style:parent-style-name="standard">
      <style:graphic-properties svg:stroke-color="#ed1c24" draw:fill="none" draw:textarea-horizontal-align="justify" draw:textarea-vertical-align="top" draw:auto-grow-height="false" fo:min-height="0.221cm" fo:min-width="3.972cm"/>
      <style:paragraph-properties style:writing-mode="lr-tb"/>
    </style:style>
    <style:style style:name="gr16" style:family="graphic" style:parent-style-name="standard">
      <style:graphic-properties svg:stroke-color="#ed1c24" draw:fill="none" draw:textarea-horizontal-align="justify" draw:textarea-vertical-align="middle" draw:auto-grow-height="false" fo:min-height="0.654cm" fo:min-width="2.654cm"/>
      <style:paragraph-properties style:writing-mode="lr-tb"/>
    </style:style>
    <style:style style:name="gr17" style:family="graphic" style:parent-style-name="standard" style:list-style-name="L1">
      <style:graphic-properties svg:stroke-color="#000000" draw:fill="solid" draw:fill-color="#ffffff" draw:textarea-horizontal-align="justify" draw:textarea-vertical-align="top" draw:auto-grow-height="false" fo:min-height="3.137cm" fo:min-width="2.497cm"/>
      <style:paragraph-properties style:writing-mode="lr-tb"/>
    </style:style>
    <style:style style:name="gr18" style:family="graphic" style:parent-style-name="standard" style:list-style-name="L1">
      <style:graphic-properties svg:stroke-color="#000000" draw:fill="solid" draw:fill-color="#ffffff" draw:textarea-horizontal-align="justify" draw:textarea-vertical-align="top" draw:auto-grow-height="false" fo:min-height="3.137cm" fo:min-width="2.497cm"/>
      <style:paragraph-properties style:writing-mode="lr-tb"/>
    </style:style>
    <style:style style:name="gr19" style:family="graphic" style:parent-style-name="objectwithoutfill" style:list-style-name="L1">
      <style:graphic-properties svg:stroke-color="#000000" draw:marker-end="Arrow" draw:marker-end-width="0.3cm" draw:fill="none" draw:textarea-vertical-align="bottom"/>
      <style:paragraph-properties style:writing-mode="lr-tb"/>
    </style:style>
    <style:style style:name="gr20" style:family="graphic" style:parent-style-name="standard">
      <style:graphic-properties svg:stroke-color="#ed1c24" draw:fill="none" draw:textarea-horizontal-align="justify" draw:textarea-vertical-align="top" draw:auto-grow-height="false" fo:min-height="1.253cm" fo:min-width="2.271cm"/>
      <style:paragraph-properties style:writing-mode="lr-tb"/>
    </style:style>
    <style:style style:name="gr21" style:family="graphic" style:parent-style-name="objectwithoutfill" style:list-style-name="L1">
      <style:graphic-properties svg:stroke-color="#000000" draw:marker-end="Arrow" draw:marker-end-width="0.3cm" draw:fill="none" draw:textarea-vertical-align="bottom"/>
      <style:paragraph-properties style:writing-mode="lr-tb"/>
    </style:style>
    <style:style style:name="gr22" style:family="graphic" style:parent-style-name="standard">
      <style:graphic-properties svg:stroke-color="#ed1c24" draw:fill="none" draw:textarea-horizontal-align="justify" draw:textarea-vertical-align="top" draw:auto-grow-height="false" fo:min-height="0.795cm" fo:min-width="2.271cm"/>
      <style:paragraph-properties style:writing-mode="lr-tb"/>
    </style:style>
    <style:style style:name="gr23" style:family="graphic" style:parent-style-name="standard">
      <style:graphic-properties svg:stroke-color="#ed1c24" draw:fill="none" draw:textarea-horizontal-align="justify" draw:textarea-vertical-align="top" draw:auto-grow-height="false" fo:min-height="0.75cm" fo:min-width="2.271cm"/>
      <style:paragraph-properties style:writing-mode="lr-tb"/>
    </style:style>
    <style:style style:name="gr24" style:family="graphic" style:parent-style-name="standard" style:list-style-name="L1">
      <style:graphic-properties svg:stroke-color="#000000" draw:fill="solid" draw:fill-color="#ffffff" draw:textarea-horizontal-align="justify" draw:textarea-vertical-align="top" draw:auto-grow-height="false" fo:min-height="3.137cm" fo:min-width="2.497cm"/>
      <style:paragraph-properties style:writing-mode="lr-tb"/>
    </style:style>
    <style:style style:name="gr25" style:family="graphic" style:parent-style-name="objectwithoutfill" style:list-style-name="L1">
      <style:graphic-properties svg:stroke-color="#000000" draw:marker-end="Arrow" draw:marker-end-width="0.3cm" draw:fill="none" draw:textarea-vertical-align="bottom"/>
      <style:paragraph-properties style:writing-mode="lr-tb"/>
    </style:style>
    <style:style style:name="gr26" style:family="graphic" style:parent-style-name="standard">
      <style:graphic-properties svg:stroke-color="#ed1c24" draw:fill="none" draw:textarea-horizontal-align="justify" draw:textarea-vertical-align="top" draw:auto-grow-height="false" fo:min-height="1.49cm" fo:min-width="4.076cm"/>
      <style:paragraph-properties style:writing-mode="lr-tb"/>
    </style:style>
    <style:style style:name="gr27" style:family="graphic" style:parent-style-name="standard">
      <style:graphic-properties svg:stroke-color="#ed1c24" draw:fill="none" draw:textarea-horizontal-align="justify" draw:textarea-vertical-align="top" draw:auto-grow-height="false" fo:min-height="0.684cm" fo:min-width="4.076cm"/>
      <style:paragraph-properties style:writing-mode="lr-tb"/>
    </style:style>
    <style:style style:name="gr28" style:family="graphic" style:parent-style-name="standard">
      <style:graphic-properties svg:stroke-color="#ed1c24" draw:fill="none" draw:textarea-horizontal-align="justify" draw:textarea-vertical-align="top" draw:auto-grow-height="false" fo:min-height="0.881cm" fo:min-width="4.076cm"/>
      <style:paragraph-properties style:writing-mode="lr-tb"/>
    </style:style>
    <style:style style:name="gr29" style:family="graphic" style:parent-style-name="standard" style:list-style-name="L1">
      <style:graphic-properties svg:stroke-color="#000000" draw:fill="solid" draw:fill-color="#ffffff" draw:textarea-horizontal-align="justify" draw:textarea-vertical-align="top" draw:auto-grow-height="false" fo:min-height="3.137cm" fo:min-width="2.497cm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top" draw:auto-grow-height="false" fo:min-height="3.137cm" fo:min-width="2.497cm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top" draw:auto-grow-height="false" fo:min-height="3.137cm" fo:min-width="2.497cm"/>
      <style:paragraph-properties style:writing-mode="lr-tb"/>
    </style:style>
    <style:style style:name="gr32" style:family="graphic" style:parent-style-name="standard" style:list-style-name="L1">
      <style:graphic-properties svg:stroke-color="#000000" draw:fill="solid" draw:fill-color="#ffffff" draw:textarea-horizontal-align="justify" draw:textarea-vertical-align="top" draw:auto-grow-height="false" fo:min-height="3.137cm" fo:min-width="2.497cm"/>
      <style:paragraph-properties style:writing-mode="lr-tb"/>
    </style:style>
    <style:style style:name="gr33" style:family="graphic" style:parent-style-name="objectwithoutfill" style:list-style-name="L1">
      <style:graphic-properties svg:stroke-color="#000000" draw:marker-end="Arrow" draw:marker-end-width="0.3cm" draw:fill="none" draw:textarea-vertical-align="bottom"/>
      <style:paragraph-properties style:writing-mode="lr-tb"/>
    </style:style>
    <style:style style:name="gr34" style:family="graphic" style:parent-style-name="standard">
      <style:graphic-properties svg:stroke-color="#ed1c24" draw:fill="none" draw:textarea-horizontal-align="justify" draw:textarea-vertical-align="top" draw:auto-grow-height="false" fo:min-height="0.265cm" fo:min-width="4.076cm"/>
      <style:paragraph-properties style:writing-mode="lr-tb"/>
    </style:style>
    <style:style style:name="gr35" style:family="graphic" style:parent-style-name="standard">
      <style:graphic-properties svg:stroke-color="#ed1c24" draw:fill="none" draw:textarea-horizontal-align="justify" draw:textarea-vertical-align="top" draw:auto-grow-height="false" fo:min-height="0.654cm" fo:min-width="2.654cm"/>
      <style:paragraph-properties style:writing-mode="lr-tb"/>
    </style:style>
    <style:style style:name="gr36" style:family="graphic" style:parent-style-name="objectwithoutfill" style:list-style-name="L1">
      <style:graphic-properties svg:stroke-color="#000000" draw:marker-end="Arrow" draw:marker-end-width="0.3cm" draw:fill="none" draw:textarea-vertical-align="bottom"/>
      <style:paragraph-properties style:writing-mode="lr-tb"/>
    </style:style>
    <style:style style:name="gr37" style:family="graphic" style:parent-style-name="standard">
      <style:graphic-properties svg:stroke-color="#ed1c24" draw:fill="none" draw:textarea-horizontal-align="justify" draw:textarea-vertical-align="middle" draw:auto-grow-height="false" fo:min-height="0.5cm" fo:min-width="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ans1" fo:font-size="7pt" style:font-size-asian="12pt" style:font-size-complex="12pt"/>
    </style:style>
    <style:style style:name="P2" style:family="paragraph">
      <loext:graphic-properties draw:fill="none"/>
      <style:paragraph-properties fo:text-align="center"/>
      <style:text-properties style:font-name="Liberation Sans1" fo:font-size="7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Sans1" fo:font-size="7pt" style:font-size-asian="8pt" style:font-size-complex="8pt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Liberation Sans1" fo:font-size="7pt" style:font-size-asian="8pt" style:font-size-complex="8pt"/>
    </style:style>
    <style:style style:name="P5" style:family="paragraph">
      <style:paragraph-properties fo:text-align="center" style:writing-mode="lr-tb"/>
      <style:text-properties style:font-name="Liberation Sans1" fo:font-size="7pt" style:font-size-asian="10pt" style:font-size-complex="10pt"/>
    </style:style>
    <style:style style:name="P6" style:family="paragraph">
      <loext:graphic-properties draw:fill="none"/>
      <style:paragraph-properties fo:text-align="center" style:writing-mode="lr-tb"/>
      <style:text-properties style:font-name="Liberation Sans1" fo:font-size="7pt" style:font-size-asian="10pt" style:font-size-complex="10pt"/>
    </style:style>
    <style:style style:name="P7" style:family="paragraph">
      <style:paragraph-properties fo:text-align="center" style:writing-mode="lr-tb"/>
      <style:text-properties style:font-name="Liberation Sans1" fo:font-size="7pt"/>
    </style:style>
    <style:style style:name="P8" style:family="paragraph">
      <loext:graphic-properties draw:fill="none"/>
      <style:paragraph-properties fo:text-align="center" style:writing-mode="lr-tb"/>
      <style:text-properties style:font-name="Liberation Sans1" fo:font-size="7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Sans1" fo:font-size="7pt" style:font-size-asian="7pt" style:font-size-complex="7pt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Liberation Sans1" fo:font-size="7pt" style:font-size-asian="7pt" style:font-size-complex="7pt"/>
    </style:style>
    <style:style style:name="P11" style:family="paragraph">
      <style:paragraph-properties style:text-autospace="non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 style:writing-mode="lr-tb">
        <style:tab-stops/>
      </style:paragraph-properties>
      <style:text-properties fo:font-variant="normal" fo:text-transform="none" fo:color="#0000ff" loext:opacity="10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Consolas" style:font-size-asian="8pt" style:font-style-asian="normal" style:font-weight-asian="normal" style:font-name-complex="Consolas" style:font-size-complex="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indent="0cm" style:text-autospace="none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Sans1" fo:font-size="7pt" style:font-size-asian="10pt" style:font-size-complex="10pt"/>
    </style:style>
    <style:style style:name="P15" style:family="paragraph">
      <style:paragraph-properties fo:text-align="center" style:writing-mode="lr-tb"/>
      <style:text-properties style:font-name="Liberation Sans1" fo:font-size="8pt" style:font-size-asian="10pt" style:font-size-complex="10pt"/>
    </style:style>
    <style:style style:name="P16" style:family="paragraph">
      <loext:graphic-properties draw:fill="none"/>
      <style:paragraph-properties fo:text-align="center" style:writing-mode="lr-tb"/>
      <style:text-properties style:font-name="Liberation Sans1" fo:font-size="8pt" style:font-size-asian="10pt" style:font-size-complex="10pt"/>
    </style:style>
    <style:style style:name="P17" style:family="paragraph">
      <loext:graphic-properties draw:fill="none"/>
      <style:paragraph-properties fo:text-align="center"/>
      <style:text-properties style:font-name="Liberation Sans1" fo:font-size="8pt"/>
    </style:style>
    <style:style style:name="P18" style:family="paragraph">
      <style:paragraph-properties fo:text-align="center" style:writing-mode="lr-tb"/>
      <style:text-properties style:font-name="Liberation Sans1" fo:font-size="8pt"/>
    </style:style>
    <style:style style:name="P19" style:family="paragraph">
      <loext:graphic-properties draw:fill="none"/>
      <style:paragraph-properties fo:text-align="center" style:writing-mode="lr-tb"/>
      <style:text-properties style:font-name="Liberation Sans1" fo:font-size="8pt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Liberation Sans1" fo:font-size="7pt" style:font-size-asian="8pt" style:font-size-complex="8pt"/>
    </style:style>
    <style:style style:name="T3" style:family="text">
      <style:text-properties style:font-name="Liberation Sans1" fo:font-size="7pt" style:font-size-asian="10pt" style:font-size-complex="10pt"/>
    </style:style>
    <style:style style:name="T4" style:family="text">
      <style:text-properties style:font-name="Liberation Sans1" fo:font-size="7pt"/>
    </style:style>
    <style:style style:name="T5" style:family="text">
      <style:text-properties style:font-name="Liberation Sans1" fo:font-size="7pt" style:font-size-asian="7pt" style:font-size-complex="7pt"/>
    </style:style>
    <style:style style:name="T6" style:family="text">
      <style:text-properties fo:font-variant="normal" fo:text-transform="none" fo:color="#0000ff" loext:opacity="100%" style:text-outline="false" style:text-line-through-style="none" style:text-line-through-type="none" style:font-name="Liberation Sans1" fo:font-size="7pt" fo:text-shadow="none" style:letter-kerning="true" style:font-name-asian="Consolas" style:font-size-asian="8pt" style:font-name-complex="Consolas" style:font-size-complex="8pt" style:text-emphasize="none" style:font-relief="none" style:text-overline-style="none" style:text-overline-color="font-color"/>
    </style:style>
    <style:style style:name="T7" style:family="text">
      <style:text-properties style:font-name="Arial Narrow" fo:font-size="9pt" style:font-size-asian="10pt" style:font-size-complex="10pt"/>
    </style:style>
    <style:style style:name="T8" style:family="text">
      <style:text-properties style:font-name="Arial Narrow"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cm" svg:height="0.639cm" svg:x="0.501cm" svg:y="4.591cm">
            <text:p text:style-name="P1"><text:span text:style-name="T1">Index</text:span>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2" draw:text-style-name="P2" draw:layer="layout" svg:x1="2.001cm" svg:y1="5.23cm" svg:x2="2.001cm" svg:y2="19.5cm">
            <text:p/>
          </draw:line>
        </draw:g>
        <draw:g>
          <draw:g>
            <draw:custom-shape draw:style-name="gr1" draw:text-style-name="P1" draw:layer="layout" svg:width="3cm" svg:height="0.639cm" svg:x="3.602cm" svg:y="4.591cm">
              <text:p text:style-name="P1"><text:span text:style-name="T1">Noyau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line draw:style-name="gr2" draw:text-style-name="P2" draw:layer="layout" svg:x1="5.102cm" svg:y1="5.23cm" svg:x2="5.102cm" svg:y2="19.5cm">
              <text:p/>
            </draw:line>
          </draw:g>
          <draw:custom-shape draw:style-name="gr3" draw:text-style-name="P4" draw:layer="layout" svg:width="2.997cm" svg:height="3.387cm" svg:x="3.599cm" svg:y="1.124cm">
            <text:p text:style-name="P3"><text:span text:style-name="T2">#donnees : array</text:span></text:p>
            <text:p text:style-name="P3"><text:span text:style-name="T2">#controleurs : array</text:span></text:p>
            <text:p text:style-name="P3"><text:span text:style-name="T2">#routes : array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3cm" svg:height="0.639cm" svg:x="8.303cm" svg:y="4.591cm">
              <text:p text:style-name="P1"><text:span text:style-name="T1">Ctr‘application’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line draw:style-name="gr2" draw:text-style-name="P2" draw:layer="layout" svg:x1="9.803cm" svg:y1="5.23cm" svg:x2="9.803cm" svg:y2="19.5cm">
              <text:p/>
            </draw:line>
          </draw:g>
          <draw:custom-shape draw:style-name="gr4" draw:text-style-name="P4" draw:layer="layout" svg:width="2.997cm" svg:height="3.387cm" svg:x="8.299cm" svg:y="1.12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3cm" svg:height="0.639cm" svg:x="11.503cm" svg:y="4.591cm">
              <text:p text:style-name="P1"><text:span text:style-name="T1">Controleur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line draw:style-name="gr2" draw:text-style-name="P2" draw:layer="layout" svg:x1="13.003cm" svg:y1="5.23cm" svg:x2="13.003cm" svg:y2="19.5cm">
              <text:p/>
            </draw:line>
          </draw:g>
          <draw:custom-shape draw:style-name="gr5" draw:text-style-name="P4" draw:layer="layout" svg:width="2.997cm" svg:height="3.387cm" svg:x="11.499cm" svg:y="1.124cm">
            <text:p text:style-name="P3"><text:span text:style-name="T2">#nomApplication</text:span></text:p>
            <text:p text:style-name="P3"><text:span text:style-name="T2">#Routeur</text:span></text:p>
            <text:p text:style-name="P3"><text:span text:style-name="T2">#Motif</text:span>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6" draw:layer="layout" svg:width="4.576cm" svg:height="0.525cm" svg:x="7.573cm" svg:y="6.766cm">
          <text:p text:style-name="P5"><text:span text:style-name="T3">Recuperation Nom 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layout" svg:x1="9.799cm" svg:y1="6.266cm" svg:x2="9.799cm" svg:y2="6.766cm">
          <text:p/>
        </draw:line>
        <draw:line draw:style-name="gr7" draw:text-style-name="P2" draw:layer="layout" svg:x1="12.999cm" svg:y1="9.716cm" svg:x2="12.999cm" svg:y2="12.898cm">
          <text:p/>
        </draw:line>
        <draw:custom-shape draw:style-name="gr8" draw:text-style-name="P8" draw:layer="layout" svg:width="2.75cm" svg:height="0.75cm" svg:x="11.624cm" svg:y="7.915cm">
          <text:p text:style-name="P7"><text:span text:style-name="T4">Controleur-&gt;constructeu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6" draw:layer="layout" svg:width="4.576cm" svg:height="0.523cm" svg:x="10.773cm" svg:y="12.915cm">
          <text:p text:style-name="P5"><text:span text:style-name="T3">Instanciation du motif</text:span></text:p>
          <text:p text:style-name="P5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2" draw:layer="layout" svg:x1="12.999cm" svg:y1="13.465cm" svg:x2="12.999cm" svg:y2="13.965cm">
          <text:p/>
        </draw:line>
        <draw:custom-shape draw:style-name="gr11" draw:text-style-name="P6" draw:layer="layout" svg:width="4.576cm" svg:height="0.471cm" svg:x="10.773cm" svg:y="13.965cm">
          <text:p text:style-name="P5"><text:span text:style-name="T3">Ajout des routes globa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layout" svg:x1="13cm" svg:y1="7.466cm" svg:x2="13cm" svg:y2="7.966cm">
          <text:p/>
        </draw:line>
        <draw:custom-shape draw:style-name="gr8" draw:text-style-name="P8" draw:layer="layout" svg:width="2.75cm" svg:height="0.75cm" svg:x="8.425cm" svg:y="5.515cm">
          <text:p text:style-name="P7"><text:span text:style-name="T4">Controleur-&gt;constructeu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line draw:style-name="gr12" draw:text-style-name="P2" draw:layer="layout" svg:x1="9.8cm" svg:y1="7.266cm" svg:x2="9.8cm" svg:y2="7.518cm">
          <text:p/>
        </draw:line>
        <draw:line draw:style-name="gr13" draw:text-style-name="P2" draw:layer="layout" svg:x1="13.013cm" svg:y1="7.506cm" svg:x2="9.789cm" svg:y2="7.506cm">
          <text:p/>
        </draw:line>
        <draw:line draw:style-name="gr14" draw:text-style-name="P2" draw:layer="layout" svg:x1="12.999cm" svg:y1="14.465cm" svg:x2="12.999cm" svg:y2="14.692cm">
          <text:p/>
        </draw:line>
        <draw:line draw:style-name="gr13" draw:text-style-name="P2" draw:layer="layout" svg:x1="13.013cm" svg:y1="14.706cm" svg:x2="9.789cm" svg:y2="14.706cm">
          <text:p/>
        </draw:line>
        <draw:line draw:style-name="gr10" draw:text-style-name="P2" draw:layer="layout" svg:x1="9.799cm" svg:y1="14.665cm" svg:x2="9.799cm" svg:y2="15.165cm">
          <text:p/>
        </draw:line>
        <draw:custom-shape draw:style-name="gr15" draw:text-style-name="P6" draw:layer="layout" svg:width="4.472cm" svg:height="0.471cm" svg:x="7.577cm" svg:y="15.165cm">
          <text:p text:style-name="P5"><text:span text:style-name="T3">Ajout des routes Loca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3.25cm" svg:height="1cm" svg:x="8.191cm" svg:y="16.165cm">
          <text:p text:style-name="P5"><text:span text:style-name="T3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9.816cm" svg:y1="15.665cm" svg:x2="9.816cm" svg:y2="16.165cm">
          <text:p/>
        </draw:line>
        <draw:line draw:style-name="gr7" draw:text-style-name="P2" draw:layer="layout" svg:x1="12.999cm" svg:y1="8.716cm" svg:x2="12.999cm" svg:y2="9.216cm">
          <text:p/>
        </draw:line>
        <draw:custom-shape draw:style-name="gr9" draw:text-style-name="P6" draw:layer="layout" svg:width="4.576cm" svg:height="0.523cm" svg:x="10.773cm" svg:y="9.215cm">
          <text:p text:style-name="P5"><text:span text:style-name="T3">Instanciation du routeur</text:span></text:p>
          <text:p text:style-name="P5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1" draw:text-style-name="P1" draw:layer="layout" svg:width="3cm" svg:height="0.639cm" svg:x="15.903cm" svg:y="4.591cm">
              <text:p text:style-name="P1"><text:span text:style-name="T1">Routeur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line draw:style-name="gr2" draw:text-style-name="P2" draw:layer="layout" svg:x1="17.403cm" svg:y1="5.23cm" svg:x2="17.403cm" svg:y2="19.5cm">
              <text:p/>
            </draw:line>
          </draw:g>
          <draw:custom-shape draw:style-name="gr17" draw:text-style-name="P4" draw:layer="layout" svg:width="2.997cm" svg:height="3.387cm" svg:x="15.899cm" svg:y="1.124cm">
            <text:p text:style-name="P3"><text:span text:style-name="T2">#Routes[]</text:span>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8" draw:layer="layout" svg:width="2.75cm" svg:height="0.75cm" svg:x="16.024cm" svg:y="10.115cm">
          <text:p text:style-name="P7"><text:span text:style-name="T4">Routeur-&gt;constructeu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line draw:style-name="gr7" draw:text-style-name="P2" draw:layer="layout" svg:x1="17.399cm" svg:y1="10.916cm" svg:x2="17.399cm" svg:y2="11.416cm">
          <text:p/>
        </draw:line>
        <draw:custom-shape draw:style-name="gr16" draw:text-style-name="P6" draw:layer="layout" svg:width="3.25cm" svg:height="1cm" svg:x="15.792cm" svg:y="11.466cm">
          <text:p text:style-name="P5"><text:span text:style-name="T3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1" draw:text-style-name="P1" draw:layer="layout" svg:width="3cm" svg:height="0.639cm" svg:x="19.304cm" svg:y="4.591cm">
              <text:p text:style-name="P1"><text:span text:style-name="T1">Motif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line draw:style-name="gr2" draw:text-style-name="P2" draw:layer="layout" svg:x1="20.804cm" svg:y1="5.23cm" svg:x2="20.804cm" svg:y2="19.5cm">
              <text:p/>
            </draw:line>
          </draw:g>
          <draw:custom-shape draw:style-name="gr18" draw:text-style-name="P10" draw:layer="layout" svg:width="2.997cm" svg:height="3.387cm" svg:x="19.3cm" svg:y="1.124cm">
            <text:p text:style-name="P9"><text:span text:style-name="T5">donnees['Configuration']</text:span></text:p>
            <text:p text:style-name="P9"><text:span text:style-name="T5">donnees['Developpeur']</text:span></text:p>
            <text:p text:style-name="P9"><text:span text:style-name="T5">donnees['Proprietaire']</text:span></text:p>
            <text:p text:style-name="P9"><text:span text:style-name="T5">donnees['Hebergeur']</text:span></text:p>
            <text:p text:style-name="P9"><text:span text:style-name="T5">donnees['Entete']</text:span></text:p>
            <text:p text:style-name="P9"><text:span text:style-name="T5">donnees['Menus']</text:span></text:p>
            <text:p text:style-name="P9"><text:span text:style-name="T5">donnees['Pied'] <text:s text:c="7"/></text:span></text:p>
            <text:p text:style-name="P9"><text:span text:style-name="T5">donnees['fichiersCss']</text:span></text:p>
            <text:p text:style-name="P9"><text:span text:style-name="T5">donnees['fichiersJavaSript']</text:span>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8" draw:layer="layout" svg:width="2.75cm" svg:height="0.75cm" svg:x="19.425cm" svg:y="13.415cm">
          <text:p text:style-name="P7"><text:span text:style-name="T4">Motif-&gt;constructeu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line draw:style-name="gr7" draw:text-style-name="P2" draw:layer="layout" svg:x1="20.8cm" svg:y1="14.216cm" svg:x2="20.8cm" svg:y2="14.716cm">
          <text:p/>
        </draw:line>
        <draw:custom-shape draw:style-name="gr16" draw:text-style-name="P6" draw:layer="layout" svg:width="3.25cm" svg:height="1cm" svg:x="19.193cm" svg:y="16.766cm">
          <text:p text:style-name="P5"><text:span text:style-name="T3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2" draw:layer="layout" svg:x1="15.326cm" svg:y1="13.151cm" svg:x2="20.842cm" svg:y2="13.151cm">
          <text:p text:style-name="P11"><text:span text:style-name="T6">New motif(fichierInit,xml)</text:span></text:p>
        </draw:line>
        <draw:custom-shape draw:style-name="gr20" draw:text-style-name="P6" draw:layer="layout" svg:width="2.771cm" svg:height="1.503cm" svg:x="19.421cm" svg:y="14.715cm">
          <text:p text:style-name="P5"><text:span text:style-name="T3">Renseignement </text:span></text:p>
          <text:p text:style-name="P5"><text:span text:style-name="T3">des données</text:span></text:p>
          <text:p text:style-name="P5"><text:span text:style-name="T3">Stockées dans le</text:span></text:p>
          <text:p text:style-name="P5"><text:span text:style-name="T3">Fichier init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20.815cm" svg:y1="16.265cm" svg:x2="20.815cm" svg:y2="16.765cm">
          <text:p/>
        </draw:line>
        <draw:line draw:style-name="gr21" draw:text-style-name="P12" draw:layer="layout" svg:x1="15.326cm" svg:y1="9.551cm" svg:x2="17.374cm" svg:y2="9.551cm">
          <text:p text:style-name="P13"><text:span text:style-name="T6">New routeur(l)</text:span></text:p>
        </draw:line>
        <draw:custom-shape draw:style-name="gr8" draw:text-style-name="P8" draw:layer="layout" svg:width="2.75cm" svg:height="0.75cm" svg:x="3.726cm" svg:y="5.516cm">
          <text:p text:style-name="P7"><text:span text:style-name="T4">Motif-&gt;constructeu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line draw:style-name="gr7" draw:text-style-name="P2" draw:layer="layout" svg:x1="5.101cm" svg:y1="6.317cm" svg:x2="5.101cm" svg:y2="6.817cm">
          <text:p/>
        </draw:line>
        <draw:custom-shape draw:style-name="gr16" draw:text-style-name="P6" draw:layer="layout" svg:width="3.25cm" svg:height="1cm" svg:x="3.494cm" svg:y="11.867cm">
          <text:p text:style-name="P5"><text:span text:style-name="T3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2.771cm" svg:height="1.503cm" svg:x="3.722cm" svg:y="6.816cm">
          <text:p text:style-name="P5"><text:span text:style-name="T3">Renseignement </text:span></text:p>
          <text:p text:style-name="P5"><text:span text:style-name="T3">des données</text:span></text:p>
          <text:p text:style-name="P5"><text:span text:style-name="T3">Sur le</text:span></text:p>
          <text:p text:style-name="P5"><text:span text:style-name="T3">Serveur de BD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116cm" svg:y1="11.366cm" svg:x2="5.116cm" svg:y2="11.866cm">
          <text:p/>
        </draw:line>
        <draw:custom-shape draw:style-name="gr8" draw:text-style-name="P8" draw:layer="layout" svg:width="2.75cm" svg:height="0.75cm" svg:x="19.426cm" svg:y="13.416cm">
          <text:p text:style-name="P7"><text:span text:style-name="T4">Motif-&gt;constructeu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line draw:style-name="gr7" draw:text-style-name="P2" draw:layer="layout" svg:x1="20.801cm" svg:y1="14.217cm" svg:x2="20.801cm" svg:y2="14.717cm">
          <text:p/>
        </draw:line>
        <draw:custom-shape draw:style-name="gr16" draw:text-style-name="P6" draw:layer="layout" svg:width="3.25cm" svg:height="1cm" svg:x="19.194cm" svg:y="16.767cm">
          <text:p text:style-name="P5"><text:span text:style-name="T3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2.771cm" svg:height="1.503cm" svg:x="19.422cm" svg:y="14.716cm">
          <text:p text:style-name="P5"><text:span text:style-name="T3">Renseignement </text:span></text:p>
          <text:p text:style-name="P5"><text:span text:style-name="T3">des données</text:span></text:p>
          <text:p text:style-name="P5"><text:span text:style-name="T3">Stockées dans le</text:span></text:p>
          <text:p text:style-name="P5"><text:span text:style-name="T3">Fichier init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20.816cm" svg:y1="16.266cm" svg:x2="20.816cm" svg:y2="16.766cm">
          <text:p/>
        </draw:line>
        <draw:line draw:style-name="gr7" draw:text-style-name="P2" draw:layer="layout" svg:x1="5.101cm" svg:y1="8.317cm" svg:x2="5.101cm" svg:y2="8.817cm">
          <text:p/>
        </draw:line>
        <draw:custom-shape draw:style-name="gr22" draw:text-style-name="P6" draw:layer="layout" svg:width="2.771cm" svg:height="1.045cm" svg:x="3.722cm" svg:y="8.816cm">
          <text:p text:style-name="P5"><text:span text:style-name="T3">Liste des controleurs</text:span></text:p>
          <text:p text:style-name="P5"><text:span text:style-name="T3">Des applications</text:span></text:p>
          <text:p text:style-name="P5"><text:span text:style-name="T3">valides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101cm" svg:y1="9.817cm" svg:x2="5.101cm" svg:y2="10.317cm">
          <text:p/>
        </draw:line>
        <draw:custom-shape draw:style-name="gr23" draw:text-style-name="P6" draw:layer="layout" svg:width="2.771cm" svg:height="1cm" svg:x="3.722cm" svg:y="10.316cm">
          <text:p text:style-name="P5"><text:span text:style-name="T3">Liste de toute les routes</text:span></text:p>
          <text:p text:style-name="P5"><text:span text:style-name="T3">Recuperé des</text:span></text:p>
          <text:p text:style-name="P5"><text:span text:style-name="T3">controleur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g>
          <draw:custom-shape draw:style-name="gr1" draw:text-style-name="P1" draw:layer="layout" svg:width="3cm" svg:height="0.639cm" svg:x="0.501cm" svg:y="4.591cm">
            <text:p text:style-name="P1"><text:span text:style-name="T1">Index</text:span>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2" draw:text-style-name="P2" draw:layer="layout" svg:x1="2.001cm" svg:y1="5.23cm" svg:x2="2.001cm" svg:y2="19.5cm">
            <text:p/>
          </draw:line>
        </draw:g>
        <draw:g>
          <draw:g>
            <draw:custom-shape draw:style-name="gr1" draw:text-style-name="P1" draw:layer="layout" svg:width="3cm" svg:height="0.639cm" svg:x="3.602cm" svg:y="4.591cm">
              <text:p text:style-name="P1"><text:span text:style-name="T1">Noyau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line draw:style-name="gr2" draw:text-style-name="P2" draw:layer="layout" svg:x1="5.102cm" svg:y1="5.23cm" svg:x2="5.102cm" svg:y2="19.5cm">
              <text:p/>
            </draw:line>
          </draw:g>
          <draw:custom-shape draw:style-name="gr24" draw:text-style-name="P4" draw:layer="layout" svg:width="2.997cm" svg:height="3.387cm" svg:x="3.599cm" svg:y="1.124cm">
            <text:p text:style-name="P3"><text:span text:style-name="T2">#donnees : array</text:span></text:p>
            <text:p text:style-name="P3"><text:span text:style-name="T2">#controleurs : array</text:span></text:p>
            <text:p text:style-name="P3"><text:span text:style-name="T2">#routes : array</text:span></text:p>
            <draw:enhanced-geometry svg:viewBox="0 0 21600 21600" draw:type="rectangle" draw:enhanced-path="M 0 0 L 21600 0 21600 21600 0 21600 0 0 Z N"/>
          </draw:custom-shape>
        </draw:g>
        <draw:line draw:style-name="gr25" draw:text-style-name="P12" draw:layer="layout" svg:x1="2cm" svg:y1="5.851cm" svg:x2="5.12cm" svg:y2="5.851cm">
          <text:p text:style-name="P11"><text:span text:style-name="T6">Noyau::getInstance()-&gt;navig()</text:span></text:p>
        </draw:line>
        <draw:custom-shape draw:style-name="gr26" draw:text-style-name="P6" draw:layer="layout" svg:width="4.576cm" svg:height="1.74cm" svg:x="2.889cm" svg:y="7.466cm">
          <text:p text:style-name="P5"><text:span text:style-name="T3">REUPERER de l’URL</text:span><text:span text:style-name="T3"><text:line-break/></text:span><text:span text:style-name="T3">- le nom de l’application</text:span></text:p>
          <text:p text:style-name="P5"><text:span text:style-name="T3">- le nom de la fonction (de l’application)</text:span></text:p>
          <text:p text:style-name="P5"><text:span text:style-name="T3">- les variablesque la fonction a baso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layout" svg:x1="5.115cm" svg:y1="6.966cm" svg:x2="5.115cm" svg:y2="7.466cm">
          <text:p/>
        </draw:line>
        <draw:line draw:style-name="gr7" draw:text-style-name="P2" draw:layer="layout" svg:x1="5.115cm" svg:y1="9.216cm" svg:x2="5.115cm" svg:y2="9.716cm">
          <text:p/>
        </draw:line>
        <draw:custom-shape draw:style-name="gr8" draw:text-style-name="P8" draw:layer="layout" svg:width="2.75cm" svg:height="0.75cm" svg:x="3.74cm" svg:y="6.215cm">
          <text:p text:style-name="P7"><text:span text:style-name="T4">Noyau-&gt;Navig(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27" draw:text-style-name="P6" draw:layer="layout" svg:width="4.576cm" svg:height="0.934cm" svg:x="2.889cm" svg:y="9.715cm">
          <text:p text:style-name="P5"><text:span text:style-name="T3">CHARGER L’APPLICATION</text:span></text:p>
          <text:p text:style-name="P5"><text:span text:style-name="T4">getControleur($application)</text:span></text:p>
          <text:p text:style-name="P5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2" draw:layer="layout" svg:x1="5.115cm" svg:y1="10.665cm" svg:x2="5.115cm" svg:y2="11.165cm">
          <text:p/>
        </draw:line>
        <draw:custom-shape draw:style-name="gr28" draw:text-style-name="P6" draw:layer="layout" svg:width="4.576cm" svg:height="1.131cm" svg:x="2.889cm" svg:y="11.165cm">
          <text:p text:style-name="P5"><text:span text:style-name="T3">EXECUTER LE FONCTION</text:span></text:p>
          <text:p text:style-name="P5"><text:span text:style-name="T3">AVEC LES EVENTUELES </text:span></text:p>
          <text:p text:style-name="P5"><text:span text:style-name="T3">VARIAB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1" draw:text-style-name="P1" draw:layer="layout" svg:width="3cm" svg:height="0.639cm" svg:x="8.303cm" svg:y="4.591cm">
              <text:p text:style-name="P1"><text:span text:style-name="T1">Ctr‘application’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line draw:style-name="gr2" draw:text-style-name="P2" draw:layer="layout" svg:x1="9.803cm" svg:y1="5.23cm" svg:x2="9.803cm" svg:y2="19.5cm">
              <text:p/>
            </draw:line>
          </draw:g>
          <draw:custom-shape draw:style-name="gr29" draw:text-style-name="P4" draw:layer="layout" svg:width="2.997cm" svg:height="3.387cm" svg:x="8.299cm" svg:y="1.12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3cm" svg:height="0.639cm" svg:x="11.503cm" svg:y="4.591cm">
              <text:p text:style-name="P1"><text:span text:style-name="T1">Controleur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line draw:style-name="gr2" draw:text-style-name="P2" draw:layer="layout" svg:x1="13.003cm" svg:y1="5.23cm" svg:x2="13.003cm" svg:y2="19.5cm">
              <text:p/>
            </draw:line>
          </draw:g>
          <draw:custom-shape draw:style-name="gr30" draw:text-style-name="P4" draw:layer="layout" svg:width="2.997cm" svg:height="3.387cm" svg:x="11.499cm" svg:y="1.124cm">
            <text:p text:style-name="P3"><text:span text:style-name="T2">#nomApplication</text:span></text:p>
            <text:p text:style-name="P3"><text:span text:style-name="T2">#Routeur</text:span></text:p>
            <text:p text:style-name="P3"><text:span text:style-name="T2">#Motif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3cm" svg:height="0.639cm" svg:x="15.903cm" svg:y="4.591cm">
              <text:p text:style-name="P1"><text:span text:style-name="T1">Routeur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line draw:style-name="gr2" draw:text-style-name="P2" draw:layer="layout" svg:x1="17.403cm" svg:y1="5.23cm" svg:x2="17.403cm" svg:y2="19.5cm">
              <text:p/>
            </draw:line>
          </draw:g>
          <draw:custom-shape draw:style-name="gr31" draw:text-style-name="P4" draw:layer="layout" svg:width="2.997cm" svg:height="3.387cm" svg:x="15.899cm" svg:y="1.124cm">
            <text:p text:style-name="P3"><text:span text:style-name="T2">#Routes[]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3cm" svg:height="0.639cm" svg:x="19.304cm" svg:y="4.591cm">
              <text:p text:style-name="P1"><text:span text:style-name="T1">Motif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line draw:style-name="gr2" draw:text-style-name="P2" draw:layer="layout" svg:x1="20.804cm" svg:y1="5.23cm" svg:x2="20.804cm" svg:y2="19.5cm">
              <text:p/>
            </draw:line>
          </draw:g>
          <draw:custom-shape draw:style-name="gr32" draw:text-style-name="P10" draw:layer="layout" svg:width="2.997cm" svg:height="3.387cm" svg:x="19.3cm" svg:y="1.124cm">
            <text:p text:style-name="P9"><text:span text:style-name="T5">donnees['Configuration']</text:span></text:p>
            <text:p text:style-name="P9"><text:span text:style-name="T5">donnees['Developpeur']</text:span></text:p>
            <text:p text:style-name="P9"><text:span text:style-name="T5">donnees['Proprietaire']</text:span></text:p>
            <text:p text:style-name="P9"><text:span text:style-name="T5">donnees['Hebergeur']</text:span></text:p>
            <text:p text:style-name="P9"><text:span text:style-name="T5">donnees['Entete']</text:span></text:p>
            <text:p text:style-name="P9"><text:span text:style-name="T5">donnees['Menus']</text:span></text:p>
            <text:p text:style-name="P9"><text:span text:style-name="T5">donnees['Pied'] <text:s text:c="7"/></text:span></text:p>
            <text:p text:style-name="P9"><text:span text:style-name="T5">donnees['fichiersCss']</text:span></text:p>
            <text:p text:style-name="P9"><text:span text:style-name="T5">donnees['fichiersJavaSript']</text:span></text:p>
            <draw:enhanced-geometry svg:viewBox="0 0 21600 21600" draw:type="rectangle" draw:enhanced-path="M 0 0 L 21600 0 21600 21600 0 21600 0 0 Z N"/>
          </draw:custom-shape>
        </draw:g>
        <draw:line draw:style-name="gr33" draw:text-style-name="P12" draw:layer="layout" svg:x1="7.526cm" svg:y1="11.751cm" svg:x2="13.042cm" svg:y2="11.751cm">
          <text:p text:style-name="P11"><text:span text:style-name="T6">ExecCallable($fonction,$tabVariables)</text:span></text:p>
        </draw:line>
        <draw:line draw:style-name="gr7" draw:text-style-name="P2" draw:layer="layout" svg:x1="13.016cm" svg:y1="12.766cm" svg:x2="13.016cm" svg:y2="13.266cm">
          <text:p/>
        </draw:line>
        <draw:custom-shape draw:style-name="gr8" draw:text-style-name="P8" draw:layer="layout" svg:width="2.75cm" svg:height="0.75cm" svg:x="11.641cm" svg:y="12.015cm">
          <text:p text:style-name="P7"><text:span text:style-name="T4">ExecCallable(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34" draw:text-style-name="P6" draw:layer="layout" svg:width="4.576cm" svg:height="0.515cm" svg:x="10.789cm" svg:y="13.215cm">
          <text:p text:style-name="P5"><text:span text:style-name="T3">Recupere les variab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layout" svg:x1="13.016cm" svg:y1="13.666cm" svg:x2="13.016cm" svg:y2="14.166cm">
          <text:p/>
        </draw:line>
        <draw:custom-shape draw:style-name="gr34" draw:text-style-name="P6" draw:layer="layout" svg:width="4.576cm" svg:height="0.515cm" svg:x="10.789cm" svg:y="14.115cm">
          <text:p text:style-name="P5"><text:span text:style-name="T3">Construit le Call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layout" svg:x1="13.016cm" svg:y1="14.566cm" svg:x2="13.016cm" svg:y2="15.066cm">
          <text:p/>
        </draw:line>
        <draw:custom-shape draw:style-name="gr35" draw:text-style-name="P6" draw:layer="layout" svg:width="3.25cm" svg:height="1cm" svg:x="11.392cm" svg:y="15.066cm">
          <text:p text:style-name="P14"><text:span text:style-name="T3">Execute le Callable</text:span></text:p>
          <text:p text:style-name="P14"><text:span text:style-name="T3">avec ses vari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6" draw:text-style-name="P12" draw:layer="layout" svg:x1="11.377cm" svg:y1="15.567cm" svg:x2="9.834cm" svg:y2="15.552cm">
          <text:p text:style-name="P11"><text:span text:style-name="T6">Callable(</text:span></text:p>
          <text:p text:style-name="P11"><text:span text:style-name="T6">Variables)</text:span></text:p>
        </draw:line>
      </draw:page>
      <draw:page draw:name="Brouillons" draw:style-name="dp1" draw:master-page-name="Standard">
        <draw:custom-shape draw:style-name="gr37" draw:text-style-name="P16" draw:layer="layout" svg:width="6.5cm" svg:height="0.75cm" svg:x="18.065cm" svg:y="6.066cm">
          <text:p text:style-name="P15"><text:span text:style-name="T7">PRÉPARATION DES VUES</text:span></text:p>
          <draw:enhanced-geometry svg:viewBox="0 0 21600 21600" draw:type="rectangle" draw:enhanced-path="M 0 0 L 21600 0 21600 21600 0 21600 0 0 Z N"/>
        </draw:custom-shape>
        <draw:line draw:style-name="gr7" draw:text-style-name="P17" draw:layer="layout" svg:x1="21.315cm" svg:y1="5.566cm" svg:x2="21.315cm" svg:y2="6.066cm">
          <text:p/>
        </draw:line>
        <draw:line draw:style-name="gr7" draw:text-style-name="P17" draw:layer="layout" svg:x1="21.315cm" svg:y1="6.816cm" svg:x2="21.315cm" svg:y2="7.316cm">
          <text:p/>
        </draw:line>
        <draw:custom-shape draw:style-name="gr16" draw:text-style-name="P16" draw:layer="layout" svg:width="3.25cm" svg:height="1cm" svg:x="19.69cm" svg:y="11.065cm">
          <text:p text:style-name="P15"><text:span text:style-name="T7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9" draw:layer="layout" svg:width="2.75cm" svg:height="0.75cm" svg:x="19.94cm" svg:y="4.815cm">
          <text:p text:style-name="P18"><text:span text:style-name="T8">rend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7" draw:text-style-name="P16" draw:layer="layout" svg:width="6.5cm" svg:height="0.75cm" svg:x="18.065cm" svg:y="7.315cm">
          <text:p text:style-name="P15"><text:span text:style-name="T7">PRÉPARATION DES VARIABLES</text:span></text:p>
          <draw:enhanced-geometry svg:viewBox="0 0 21600 21600" draw:type="rectangle" draw:enhanced-path="M 0 0 L 21600 0 21600 21600 0 21600 0 0 Z N"/>
        </draw:custom-shape>
        <draw:line draw:style-name="gr7" draw:text-style-name="P17" draw:layer="layout" svg:x1="21.315cm" svg:y1="8.065cm" svg:x2="21.315cm" svg:y2="8.565cm">
          <text:p/>
        </draw:line>
        <draw:custom-shape draw:style-name="gr37" draw:text-style-name="P16" draw:layer="layout" svg:width="6.5cm" svg:height="0.75cm" svg:x="18.065cm" svg:y="8.565cm">
          <text:p text:style-name="P15"><text:span text:style-name="T7">MISE EN CACHE DE LA PAGE</text:span></text:p>
          <draw:enhanced-geometry svg:viewBox="0 0 21600 21600" draw:type="rectangle" draw:enhanced-path="M 0 0 L 21600 0 21600 21600 0 21600 0 0 Z N"/>
        </draw:custom-shape>
        <draw:line draw:style-name="gr7" draw:text-style-name="P17" draw:layer="layout" svg:x1="21.315cm" svg:y1="9.315cm" svg:x2="21.315cm" svg:y2="9.815cm">
          <text:p/>
        </draw:line>
        <draw:custom-shape draw:style-name="gr37" draw:text-style-name="P16" draw:layer="layout" svg:width="6.5cm" svg:height="0.75cm" svg:x="18.065cm" svg:y="9.815cm">
          <text:p text:style-name="P15"><text:span text:style-name="T7">RENDU DU CACHE</text:span></text:p>
          <draw:enhanced-geometry svg:viewBox="0 0 21600 21600" draw:type="rectangle" draw:enhanced-path="M 0 0 L 21600 0 21600 21600 0 21600 0 0 Z N"/>
        </draw:custom-shape>
        <draw:line draw:style-name="gr7" draw:text-style-name="P17" draw:layer="layout" svg:x1="21.315cm" svg:y1="10.565cm" svg:x2="21.315cm" svg:y2="11.06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/>
    <style:font-face style:name="Mangal1" svg:font-family="Mangal"/>
    <style:font-face style:name="Liberation Mono2" svg:font-family="'Liberation Mono', 'Courier New'" style:font-family-generic="modern" style:font-pitch="fixed"/>
    <style:font-face style:name="NSimSun2" svg:font-family="NSimSun" style:font-family-generic="modern" style:font-pitch="fixed"/>
    <style:font-face style:name="Arial2" svg:font-family="Arial" style:font-pitch="variable"/>
    <style:font-face style:name="Consolas1" svg:font-family="Consolas" style:font-pitch="variable"/>
    <style:font-face style:name="Mangal" svg:font-family="Mangal" style:font-pitch="variable"/>
    <style:font-face style:name="Microsoft YaHei1" svg:font-family="'Microsoft YaHei'" style:font-pitch="variable"/>
    <style:font-face style:name="SimSun1" svg:font-family="SimSun" style:font-pitch="variable"/>
    <style:font-face style:name="Liberation Mono1" svg:font-family="'Liberation Mono', 'Courier New'" style:font-family-generic="modern" style:font-pitch="variable"/>
    <style:font-face style:name="NSimSun1" svg:font-family="NSimSun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Liberation Serif2" svg:font-family="'Liberation Serif', 'Times New Roman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SimSun1" style:font-family-asian="SimSun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SimSun1" style:font-family-asian="SimSun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NSimSun2" style:font-family-asian="NSimSun" style:font-family-generic-asian="modern" style:font-pitch-asian="fixed" style:font-name-complex="Liberation Mono2" style:font-family-complex="'Liberation Mono', 'Courier New'" style:font-family-generic-complex="modern" style:font-pitch-complex="fixe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Mangal1" style:font-family-complex="Mangal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complex="Mangal1" style:font-family-complex="Mangal"/>
    </style:style>
    <style:style style:name="Corps_20_de_20_texte" style:display-name="Corps de texte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7T07:00:21.366000000</meta:creation-date>
    <dc:date>2021-08-29T07:59:03.364000000</dc:date>
    <meta:editing-duration>PT1H36M18S</meta:editing-duration>
    <meta:editing-cycles>7</meta:editing-cycles>
    <meta:generator>LibreOffice/7.1.4.2$Windows_X86_64 LibreOffice_project/a529a4fab45b75fefc5b6226684193eb000654f6</meta:generator>
    <meta:document-statistic meta:object-count="127"/>
  </office:meta>
</office:document-meta>
</file>